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Basic/VBAProject/WriteData.xml" manifest:media-type="text/xml"/>
  <manifest:file-entry manifest:full-path="Basic/VBAProject/Sheet5.xml" manifest:media-type="text/xml"/>
  <manifest:file-entry manifest:full-path="Basic/VBAProject/Sheet2.xml" manifest:media-type="text/xml"/>
  <manifest:file-entry manifest:full-path="Basic/VBAProject/Sheet1.xml" manifest:media-type="text/xml"/>
  <manifest:file-entry manifest:full-path="Basic/VBAProject/ReadData.xml" manifest:media-type="text/xml"/>
  <manifest:file-entry manifest:full-path="Basic/VBAProject/Sheet3.xml" manifest:media-type="text/xml"/>
  <manifest:file-entry manifest:full-path="Basic/VBAProject/script-lb.xml" manifest:media-type="text/xml"/>
  <manifest:file-entry manifest:full-path="Basic/VBAProject/Sheet4.xml" manifest:media-type="text/xml"/>
  <manifest:file-entry manifest:full-path="Basic/VBAProject/ThisWorkbook.xml" manifest:media-type="text/xml"/>
  <manifest:file-entry manifest:full-path="Basic/VBAProject/JsonConvert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21E00000A0600000A067955A2F2.svg" manifest:media-type="image/svg+xml"/>
  <manifest:file-entry manifest:full-path="Pictures/10000001000004F50000018A915B2E95.png" manifest:media-type="image/png"/>
  <manifest:file-entry manifest:full-path="Pictures/10000001000000C2000000C27D3E5B17.png" manifest:media-type="image/png"/>
  <manifest:file-entry manifest:full-path="Pictures/100048C7000067A6000020304405CD39.svg" manifest:media-type="image/svg+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46" style:family="table-column">
      <style:table-column-properties fo:break-before="auto" style:column-width="5.581cm"/>
    </style:style>
    <style:style style:name="co47" style:family="table-column">
      <style:table-column-properties fo:break-before="auto" style:column-width="4.792cm"/>
    </style:style>
    <style:style style:name="co34" style:family="table-column">
      <style:table-column-properties fo:break-before="auto" style:column-width="6.793cm"/>
    </style:style>
    <style:style style:name="co48" style:family="table-column">
      <style:table-column-properties fo:break-before="auto" style:column-width="6.198cm"/>
    </style:style>
    <style:style style:name="co49" style:family="table-column">
      <style:table-column-properties fo:break-before="auto" style:column-width="3.26cm"/>
    </style:style>
    <style:style style:name="co11" style:family="table-column">
      <style:table-column-properties fo:break-before="auto" style:column-width="17.978cm"/>
    </style:style>
    <style:style style:name="co50" style:family="table-column">
      <style:table-column-properties fo:break-before="auto" style:column-width="2.272cm"/>
    </style:style>
    <style:style style:name="co51" style:family="table-column">
      <style:table-column-properties fo:break-before="auto" style:column-width="4.371cm"/>
    </style:style>
    <style:style style:name="co6" style:family="table-column">
      <style:table-column-properties fo:break-before="auto" style:column-width="1.845cm"/>
    </style:style>
    <style:style style:name="co10" style:family="table-column">
      <style:table-column-properties fo:break-before="auto" style:column-width="5.359cm"/>
    </style:style>
    <style:style style:name="co12" style:family="table-column">
      <style:table-column-properties fo:break-before="auto" style:column-width="1.236cm"/>
    </style:style>
    <style:style style:name="co13" style:family="table-column">
      <style:table-column-properties fo:break-before="auto" style:column-width="5.63cm"/>
    </style:style>
    <style:style style:name="co14" style:family="table-column">
      <style:table-column-properties fo:break-before="auto" style:column-width="5.309cm"/>
    </style:style>
    <style:style style:name="co15" style:family="table-column">
      <style:table-column-properties fo:break-before="auto" style:column-width="0.319cm"/>
    </style:style>
    <style:style style:name="co16" style:family="table-column">
      <style:table-column-properties fo:break-before="auto" style:column-width="1.309cm"/>
    </style:style>
    <style:style style:name="co17" style:family="table-column">
      <style:table-column-properties fo:break-before="auto" style:column-width="2.445cm"/>
    </style:style>
    <style:style style:name="co18" style:family="table-column">
      <style:table-column-properties fo:break-before="auto" style:column-width="7.59cm"/>
    </style:style>
    <style:style style:name="co19" style:family="table-column">
      <style:table-column-properties fo:break-before="auto" style:column-width="2.018cm"/>
    </style:style>
    <style:style style:name="co20" style:family="table-column">
      <style:table-column-properties fo:break-before="auto" style:column-width="10.174cm"/>
    </style:style>
    <style:style style:name="co21" style:family="table-column">
      <style:table-column-properties fo:break-before="auto" style:column-width="3.334cm"/>
    </style:style>
    <style:style style:name="co22" style:family="table-column">
      <style:table-column-properties fo:break-before="auto" style:column-width="9.137cm"/>
    </style:style>
    <style:style style:name="co23" style:family="table-column">
      <style:table-column-properties fo:break-before="auto" style:column-width="2.593cm"/>
    </style:style>
    <style:style style:name="co24" style:family="table-column">
      <style:table-column-properties fo:break-before="auto" style:column-width="1.58cm"/>
    </style:style>
    <style:style style:name="co25" style:family="table-column">
      <style:table-column-properties fo:break-before="auto" style:column-width="4.223cm"/>
    </style:style>
    <style:style style:name="co26" style:family="table-column">
      <style:table-column-properties fo:break-before="auto" style:column-width="4.272cm"/>
    </style:style>
    <style:style style:name="co27" style:family="table-column">
      <style:table-column-properties fo:break-before="auto" style:column-width="3.828cm"/>
    </style:style>
    <style:style style:name="co28" style:family="table-column">
      <style:table-column-properties fo:break-before="auto" style:column-width="3.087cm"/>
    </style:style>
    <style:style style:name="co29" style:family="table-column">
      <style:table-column-properties fo:break-before="auto" style:column-width="4.667cm"/>
    </style:style>
    <style:style style:name="co30" style:family="table-column">
      <style:table-column-properties fo:break-before="auto" style:column-width="1.729cm"/>
    </style:style>
    <style:style style:name="co31" style:family="table-column">
      <style:table-column-properties fo:break-before="auto" style:column-width="1.556cm"/>
    </style:style>
    <style:style style:name="co32" style:family="table-column">
      <style:table-column-properties fo:break-before="auto" style:column-width="2.716cm"/>
    </style:style>
    <style:style style:name="co33" style:family="table-column">
      <style:table-column-properties fo:break-before="auto" style:column-width="2.247cm"/>
    </style:style>
    <style:style style:name="co35" style:family="table-column">
      <style:table-column-properties fo:break-before="auto" style:column-width="3.358cm"/>
    </style:style>
    <style:style style:name="co36" style:family="table-column">
      <style:table-column-properties fo:break-before="auto" style:column-width="3.951cm"/>
    </style:style>
    <style:style style:name="co37" style:family="table-column">
      <style:table-column-properties fo:break-before="auto" style:column-width="1.704cm"/>
    </style:style>
    <style:style style:name="co38" style:family="table-column">
      <style:table-column-properties fo:break-before="auto" style:column-width="4.098cm"/>
    </style:style>
    <style:style style:name="co39" style:family="table-column">
      <style:table-column-properties fo:break-before="auto" style:column-width="2.963cm"/>
    </style:style>
    <style:style style:name="co40" style:family="table-column">
      <style:table-column-properties fo:break-before="auto" style:column-width="6.89cm"/>
    </style:style>
    <style:style style:name="co41" style:family="table-column">
      <style:table-column-properties fo:break-before="auto" style:column-width="6.396cm"/>
    </style:style>
    <style:style style:name="co42" style:family="table-column">
      <style:table-column-properties fo:break-before="auto" style:column-width="4.198cm"/>
    </style:style>
    <style:style style:name="co43" style:family="table-column">
      <style:table-column-properties fo:break-before="auto" style:column-width="6.618cm"/>
    </style:style>
    <style:style style:name="co44" style:family="table-column">
      <style:table-column-properties fo:break-before="auto" style:column-width="5.456cm"/>
    </style:style>
    <style:style style:name="co45" style:family="table-column">
      <style:table-column-properties fo:break-before="auto" style:column-width="2.074cm"/>
    </style:style>
    <style:style style:name="co52" style:family="table-column">
      <style:table-column-properties fo:break-before="auto" style:column-width="2.889cm"/>
    </style:style>
    <style:style style:name="co53" style:family="table-column">
      <style:table-column-properties fo:break-before="auto" style:column-width="3.63cm"/>
    </style:style>
    <style:style style:name="co54" style:family="table-column">
      <style:table-column-properties fo:break-before="auto" style:column-width="12.495cm"/>
    </style:style>
    <style:style style:name="co55" style:family="table-column">
      <style:table-column-properties fo:break-before="auto" style:column-width="5.729cm"/>
    </style:style>
    <style:style style:name="co56" style:family="table-column">
      <style:table-column-properties fo:break-before="auto" style:column-width="6.57cm"/>
    </style:style>
    <style:style style:name="co57" style:family="table-column">
      <style:table-column-properties fo:break-before="auto" style:column-width="5.112cm"/>
    </style:style>
    <style:style style:name="co58" style:family="table-column">
      <style:table-column-properties fo:break-before="auto" style:column-width="6.345cm"/>
    </style:style>
    <style:style style:name="co59" style:family="table-column">
      <style:table-column-properties fo:break-before="auto" style:column-width="2.258cm"/>
    </style:style>
    <style:style style:name="co60" style:family="table-column">
      <style:table-column-properties fo:break-before="auto" style:column-width="5.653cm"/>
    </style:style>
    <style:style style:name="co61" style:family="table-column">
      <style:table-column-properties fo:break-before="auto" style:column-width="6.131cm"/>
    </style:style>
    <style:style style:name="co62" style:family="table-column">
      <style:table-column-properties fo:break-before="auto" style:column-width="3.896cm"/>
    </style:style>
    <style:style style:name="co63" style:family="table-column">
      <style:table-column-properties fo:break-before="auto" style:column-width="5.36cm"/>
    </style:style>
    <style:style style:name="co64" style:family="table-column">
      <style:table-column-properties fo:break-before="auto" style:column-width="7.682cm"/>
    </style:style>
    <style:style style:name="ro1"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3" style:family="table-row">
      <style:table-row-properties style:row-height="0.778cm" fo:break-before="auto" style:use-optimal-row-height="true"/>
    </style:style>
    <style:style style:name="ro5" style:family="table-row">
      <style:table-row-properties style:row-height="0.5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ta3" style:family="table" style:master-page-name="PageStyle_5f_connections">
      <style:table-properties table:display="true" style:writing-mode="lr-tb"/>
    </style:style>
    <style:style style:name="ta5" style:family="table" style:master-page-name="PageStyle_5f_defs">
      <style:table-properties table:display="false" style:writing-mode="lr-tb"/>
    </style:style>
    <style:style style:name="ta4" style:family="table" style:master-page-name="PageStyle_5f_JSON-SCADA_20_Config">
      <style:table-properties table:display="true" style:writing-mode="lr-tb"/>
    </style:style>
    <style:style style:name="ta6" style:family="table" style:master-page-name="PageStyle_5f_tags">
      <style:table-properties table:display="true" style:writing-mode="lr-tb"/>
    </style:style>
    <style:style style:name="ta7" style:family="table" style:master-page-name="PageStyle_5f_protocolDriverInstances">
      <style:table-properties table:display="true" style:writing-mode="lr-tb"/>
    </style:style>
    <number:number-style style:name="N1">
      <number:number number:decimal-places="0" number:min-decimal-places="0" number:min-integer-digits="1"/>
    </number:number-style>
    <number:boolean-style style:name="N99">
      <number:boolean/>
    </number:boolean-style>
    <number:text-style style:name="N100">
      <number:text-content/>
    </number:text-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1"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1" style:family="table-cell" style:parent-style-name="Default" style:data-style-name="N99">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a0101"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 style:family="table-cell" style:parent-style-name="Default" style:data-style-name="N1">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style>
    <style:style style:name="ce15"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AND(ISBLANK([.B2]);NOT(ISBLANK([.A2]))))" style:apply-style-name="ConditionalStyle_5f_12" style:base-cell-address="tags.A2"/>
    </style:style>
    <style:style style:name="ce17"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AND(ISBLANK([.B2]);NOT(ISBLANK([.A2]))))" style:apply-style-name="ConditionalStyle_5f_12" style:base-cell-address="tags.A2"/>
    </style:style>
    <style:style style:name="ce18"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AND(ISBLANK([.B2]);NOT(ISBLANK([.A2]))))" style:apply-style-name="ConditionalStyle_5f_12" style:base-cell-address="tags.A2"/>
    </style:style>
    <style:style style:name="ce1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AND(ISBLANK([.B2]);NOT(ISBLANK([.A2]))))" style:apply-style-name="ConditionalStyle_5f_12" style:base-cell-address="tags.A2"/>
    </style:style>
    <style:style style:name="ce37" style:family="table-cell" style:parent-style-name="Default" style:data-style-name="N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style>
    <style:style style:name="ce28" style:family="table-cell" style:parent-style-name="Default"/>
    <style:style style:name="ce30" style:family="table-cell" style:parent-style-name="Default" style:data-style-name="N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style>
    <style:style style:name="ce32" style:family="table-cell" style:parent-style-name="Default"/>
    <style:style style:name="ce35" style:family="table-cell" style:parent-style-name="Default"/>
    <style:style style:name="ce2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2"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43"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44"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47" style:family="table-cell" style:parent-style-name="Default" style:data-style-name="N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3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8" style:base-cell-address="tags.C2"/>
      <style:map style:condition="cell-content()=&quot;digital&quot;" style:apply-style-name="ConditionalStyle_5f_9" style:base-cell-address="tags.C2"/>
      <style:map style:condition="cell-content()=&quot;analog&quot;" style:apply-style-name="ConditionalStyle_5f_10" style:base-cell-address="tags.C2"/>
    </style:style>
    <style:style style:name="ce87" style:family="table-cell" style:parent-style-name="Default" style:data-style-name="N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style>
    <style:style style:name="ce88"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style>
    <style:style style:name="ce8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3" style:family="table-cell" style:parent-style-name="Default" style:data-style-name="N100">
      <style:table-cell-properties style:rotation-align="none"/>
    </style:style>
    <style:style style:name="ce126" style:family="table-cell" style:parent-style-name="Default" style:data-style-name="N100"/>
    <style:style style:name="ce74"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6"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style>
    <style:style style:name="ce9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4"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C2]=&quot;digital&quot;)" style:apply-style-name="ConditionalStyle_5f_16" style:base-cell-address="tags.L2"/>
    </style:style>
    <style:style style:name="ce3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digital&quot;)" style:apply-style-name="ConditionalStyle_5f_16" style:base-cell-address="tags.L2"/>
    </style:style>
    <style:style style:name="ce4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quot;digital&quot;)" style:apply-style-name="ConditionalStyle_5f_16" style:base-cell-address="tags.L2"/>
    </style:style>
    <style:style style:name="ce41"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quot;digital&quot;)" style:apply-style-name="ConditionalStyle_5f_16" style:base-cell-address="tags.L2"/>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quot;digital&quot;)" style:apply-style-name="ConditionalStyle_5f_16" style:base-cell-address="tags.L2"/>
    </style:style>
    <style:style style:name="ce108" style:family="table-cell" style:parent-style-name="Default" style:data-style-name="N135">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style>
    <style:style style:name="ce92"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C2]=&quot;digital&quot;)" style:apply-style-name="ConditionalStyle_5f_16" style:base-cell-address="tags.L2"/>
    </style:style>
    <style:style style:name="ce4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digital&quot;)" style:apply-style-name="ConditionalStyle_5f_16" style:base-cell-address="tags.L2"/>
    </style:style>
    <style:style style:name="ce46"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quot;digital&quot;)" style:apply-style-name="ConditionalStyle_5f_16" style:base-cell-address="tags.L2"/>
    </style:style>
    <style:style style:name="ce24"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quot;digital&quot;)" style:apply-style-name="ConditionalStyle_5f_16" style:base-cell-address="tags.L2"/>
    </style:style>
    <style:style style:name="ce97"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D2]=&quot;command&quot;)" style:apply-style-name="ConditionalStyle_5f_15" style:base-cell-address="tags.P2"/>
    </style:style>
    <style:style style:name="ce48"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2]=&quot;command&quot;)" style:apply-style-name="ConditionalStyle_5f_15" style:base-cell-address="tags.P2"/>
    </style:style>
    <style:style style:name="ce4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quot;command&quot;)" style:apply-style-name="ConditionalStyle_5f_15" style:base-cell-address="tags.P2"/>
    </style:style>
    <style:style style:name="ce5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quot;command&quot;)" style:apply-style-name="ConditionalStyle_5f_15" style:base-cell-address="tags.P2"/>
    </style:style>
    <style:style style:name="ce5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quot;command&quot;)" style:apply-style-name="ConditionalStyle_5f_15" style:base-cell-address="tags.P2"/>
    </style:style>
    <style:style style:name="ce105"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D2]&lt;&gt;&quot;command&quot;)" style:apply-style-name="ConditionalStyle_5f_14" style:base-cell-address="tags.Q2"/>
    </style:style>
    <style:style style:name="ce52"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2]&lt;&gt;&quot;command&quot;)" style:apply-style-name="ConditionalStyle_5f_14" style:base-cell-address="tags.Q2"/>
    </style:style>
    <style:style style:name="ce53"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4" style:base-cell-address="tags.Q2"/>
    </style:style>
    <style:style style:name="ce5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4" style:base-cell-address="tags.Q2"/>
    </style:style>
    <style:style style:name="ce5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4" style:base-cell-address="tags.Q2"/>
    </style:style>
    <style:style style:name="ce113"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digital&quot;)" style:apply-style-name="ConditionalStyle_5f_17" style:base-cell-address="tags.V2"/>
    </style:style>
    <style:style style:name="ce5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digital&quot;)" style:apply-style-name="ConditionalStyle_5f_17" style:base-cell-address="tags.V2"/>
    </style:style>
    <style:style style:name="ce6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digital&quot;)" style:apply-style-name="ConditionalStyle_5f_17" style:base-cell-address="tags.V2"/>
    </style:style>
    <style:style style:name="ce119"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digital&quot;)" style:apply-style-name="ConditionalStyle_5f_17" style:base-cell-address="tags.V2"/>
    </style:style>
    <style:style style:name="ce63"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digital&quot;)" style:apply-style-name="ConditionalStyle_5f_17" style:base-cell-address="tags.V2"/>
    </style:style>
    <style:style style:name="ce123"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digital&quot;)" style:apply-style-name="ConditionalStyle_5f_17" style:base-cell-address="tags.V2"/>
    </style:style>
    <style:style style:name="ce64"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digital&quot;)" style:apply-style-name="ConditionalStyle_5f_17" style:base-cell-address="tags.V2"/>
    </style:style>
    <style:style style:name="ce127"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digital&quot;)" style:apply-style-name="ConditionalStyle_5f_17" style:base-cell-address="tags.V2"/>
    </style:style>
    <style:style style:name="ce68"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digital&quot;)" style:apply-style-name="ConditionalStyle_5f_17" style:base-cell-address="tags.V2"/>
    </style:style>
    <style:style style:name="ce129"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D2]&lt;&gt;&quot;command&quot;)" style:apply-style-name="ConditionalStyle_5f_11" style:base-cell-address="tags.AI2"/>
    </style:style>
    <style:style style:name="ce6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1" style:base-cell-address="tags.AI2"/>
    </style:style>
    <style:style style:name="ce131"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D2]&lt;&gt;&quot;command&quot;)" style:apply-style-name="ConditionalStyle_5f_11" style:base-cell-address="tags.AI2"/>
    </style:style>
    <style:style style:name="ce7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2]&lt;&gt;&quot;command&quot;)" style:apply-style-name="ConditionalStyle_5f_11" style:base-cell-address="tags.AI2"/>
    </style:style>
    <style:style style:name="ce72"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1" style:base-cell-address="tags.AI2"/>
    </style:style>
    <style:style style:name="ce7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1" style:base-cell-address="tags.AI2"/>
    </style:style>
    <style:style style:name="ce137"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D2]&lt;&gt;&quot;command&quot;)" style:apply-style-name="ConditionalStyle_5f_11" style:base-cell-address="tags.AI2"/>
    </style:style>
    <style:style style:name="ce78"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command&quot;)" style:apply-style-name="ConditionalStyle_5f_11" style:base-cell-address="tags.AI2"/>
    </style:style>
    <style:style style:name="ce140"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D2]&lt;&gt;&quot;command&quot;)" style:apply-style-name="ConditionalStyle_5f_11" style:base-cell-address="tags.AI2"/>
    </style:style>
    <style:style style:name="ce7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2]&lt;&gt;&quot;command&quot;)" style:apply-style-name="ConditionalStyle_5f_11" style:base-cell-address="tags.AI2"/>
    </style:style>
    <style:style style:name="ce143" style:family="table-cell" style:parent-style-name="Default" style:data-style-name="N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1]&lt;&gt;&quot;analog&quot;)" style:apply-style-name="ConditionalStyle_5f_7" style:base-cell-address="tags.AL1"/>
    </style:style>
    <style:style style:name="ce145"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81"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49"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C2]&lt;&gt;&quot;analog&quot;)" style:apply-style-name="ConditionalStyle_5f_7" style:base-cell-address="tags.AL2"/>
    </style:style>
    <style:style style:name="ce9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9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52"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12"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9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01"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lt;&gt;&quot;analog&quot;)" style:apply-style-name="ConditionalStyle_5f_7" style:base-cell-address="tags.AL2"/>
    </style:style>
    <style:style style:name="ce156"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17"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0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59"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10"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61"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C2]&lt;&gt;&quot;analog&quot;)" style:apply-style-name="ConditionalStyle_5f_7" style:base-cell-address="tags.AL2"/>
    </style:style>
    <style:style style:name="ce162"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22"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1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1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lt;&gt;&quot;analog&quot;)" style:apply-style-name="ConditionalStyle_5f_7" style:base-cell-address="tags.AL2"/>
    </style:style>
    <style:style style:name="ce166"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2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69"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map style:condition="is-true-formula([.$C2]&lt;&gt;&quot;analog&quot;)" style:apply-style-name="ConditionalStyle_5f_7" style:base-cell-address="tags.AL2"/>
    </style:style>
    <style:style style:name="ce133"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71" style:family="table-cell" style:parent-style-name="Default" style:data-style-name="N100">
      <style:table-cell-properties style:cell-protect="protected" style:print-content="true" style:text-align-source="value-type" style:repeat-content="false" style:direction="ltr" style:rotation-angle="0" loext:vertical-justify="auto"/>
      <style:paragraph-properties css3t:text-justify="auto" fo:margin-left="0cm" style:writing-mode="page"/>
      <style:text-properties style:text-outline="false" style:text-line-through-style="none" style:text-line-through-type="none" fo:text-shadow="none" style:text-underline-style="none"/>
      <style:map style:condition="is-true-formula([.$C2]&lt;&gt;&quot;analog&quot;)" style:apply-style-name="ConditionalStyle_5f_7" style:base-cell-address="tags.AL2"/>
    </style:style>
    <style:style style:name="ce139"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C2]&lt;&gt;&quot;analog&quot;)" style:apply-style-name="ConditionalStyle_5f_7" style:base-cell-address="tags.AL2"/>
    </style:style>
    <style:style style:name="ce142"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5" style:base-cell-address="tags.AV2"/>
    </style:style>
    <style:style style:name="ce56"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5" style:base-cell-address="tags.AV2"/>
    </style:style>
    <style:style style:name="ce144"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6" style:base-cell-address="tags.AW2"/>
    </style:style>
    <style:style style:name="ce58"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6" style:base-cell-address="tags.AW2"/>
    </style:style>
    <style:style style:name="ce146"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6" style:base-cell-address="tags.AW2"/>
    </style:style>
    <style:style style:name="ce147"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is-true-formula([.$D2]&lt;&gt;&quot;supervised&quot;)" style:apply-style-name="ConditionalStyle_5f_6" style:base-cell-address="tags.AW2"/>
    </style:style>
    <style:style style:name="ce2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1" style:family="table-cell" style:parent-style-name="Default" style:data-style-name="N99">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a0101"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textarea-vertical-align="middle" fo:background-color="#ece9d8" loext:decorative="false"/>
      <style:text-properties fo:color="#000000" style:text-line-through-style="none" style:text-line-through-type="none" fo:font-size="10pt" fo:font-style="normal" style:text-underline-style="none" fo:font-weight="normal"/>
    </style:style>
    <style:style style:name="P1" style:family="paragraph">
      <loext:graphic-properties draw:fill="none"/>
      <style:paragraph-properties fo:text-align="left"/>
      <style:text-properties fo:font-size="18pt"/>
    </style:style>
    <style:style style:name="P2" style:family="paragraph">
      <style:paragraph-properties fo:text-align="center"/>
      <style:text-properties fo:color="#000000" style:text-line-through-style="none" style:text-line-through-type="none" fo:font-size="10pt" fo:font-style="normal" style:text-underline-style="none" fo:font-weight="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cell-content-is-whole-number() and cell-content-is-between(1,99999999999999)" table:allow-empty-cell="true" table:base-cell-address="defs.A1">
          <table:help-message table:title="_id" table:display="true">
            <text:p>Enter a unique whole number.</text:p>
          </table:help-message>
          <table:error-message table:message-type="stop" table:display="true"/>
        </table:content-validation>
        <table:content-validation table:name="val2" table:base-cell-address="tags.A1">
          <table:help-message table:title="_id" table:display="true">
            <text:p>Enter a unique whole number.</text:p>
          </table:help-message>
          <table:error-message table:message-type="stop" table:display="true"/>
        </table:content-validation>
        <table:content-validation table:name="val3" table:condition="of:is-true-formula(IF(ISERR(LEFT([.B1];1)*1);1;0))" table:allow-empty-cell="true" table:base-cell-address="defs.B1">
          <table:help-message table:title="Tag" table:display="true">
            <text:p>Tags must begin with a letter.</text:p>
            <text:p>Leave empty to delete tag based on _id column.</text:p>
          </table:help-message>
          <table:error-message table:message-type="stop" table:display="true"/>
        </table:content-validation>
        <table:content-validation table:name="val4" table:condition="of:cell-content-is-in-list([$defs.$A$1:.$A$4])" table:allow-empty-cell="true" table:display-list="unsorted" table:base-cell-address="defs.C1">
          <table:help-message table:title="Type" table:display="true">
            <text:p>Analog for numeric values</text:p>
            <text:p>Digital for binary/boolean values</text:p>
            <text:p>String for text data</text:p>
            <text:p>JSON for structured data</text:p>
          </table:help-message>
          <table:error-message table:message-type="stop" table:title="Type" table:display="true">
            <text:p>Must be one of </text:p>
            <text:p>analog</text:p>
            <text:p>digital</text:p>
            <text:p>string</text:p>
            <text:p>json</text:p>
          </table:error-message>
        </table:content-validation>
        <table:content-validation table:name="val5" table:condition="of:cell-content-is-in-list([$defs.$A$1:.$A$4])" table:allow-empty-cell="true" table:display-list="unsorted" table:base-cell-address="tags.C2">
          <table:help-message table:title="Type" table:display="true">
            <text:p>Analog for numeric values</text:p>
            <text:p>Digital for binary/boolean values</text:p>
            <text:p>String for text data</text:p>
            <text:p>JSON for structured data</text:p>
          </table:help-message>
          <table:error-message table:message-type="stop" table:title="Type" table:display="true">
            <text:p>Must be one of </text:p>
            <text:p>analog</text:p>
            <text:p>digital</text:p>
            <text:p>string</text:p>
            <text:p>json</text:p>
          </table:error-message>
        </table:content-validation>
        <table:content-validation table:name="val6" table:condition="of:cell-content-is-in-list([$defs.$B$1:.$B$4])" table:allow-empty-cell="true" table:display-list="unsorted" table:base-cell-address="defs.D1">
          <table:help-message table:title="Origin" table:display="true">
            <text:p>Origin of data</text:p>
            <text:p>Supervised for aquired data.</text:p>
            <text:p>Command for control/setpoint.</text:p>
            <text:p>Manual for operator set data.</text:p>
            <text:p>Calculated for calculations based on parcel and formulas.</text:p>
          </table:help-message>
          <table:error-message table:message-type="stop" table:title="Origin" table:display="true">
            <text:p>Must be one of</text:p>
            <text:p>supervised</text:p>
            <text:p>command</text:p>
            <text:p>manual</text:p>
            <text:p>calculated</text:p>
          </table:error-message>
        </table:content-validation>
        <table:content-validation table:name="val7" table:base-cell-address="defs.E1">
          <table:help-message table:title="Description" table:display="true">
            <text:p>Describe the data point.</text:p>
            <text:p>Divide in 3 sections for better browsing.</text:p>
            <text:p>Station~section~data description.</text:p>
          </table:help-message>
          <table:error-message table:message-type="stop" table:display="true"/>
        </table:content-validation>
        <table:content-validation table:name="val8" table:base-cell-address="defs.F1">
          <table:help-message table:title="ungroupedDescription" table:display="true">
            <text:p>Description of the data point without location/section.</text:p>
          </table:help-message>
          <table:error-message table:message-type="stop" table:display="true"/>
        </table:content-validation>
        <table:content-validation table:name="val9" table:base-cell-address="defs.G1">
          <table:help-message table:title="group1" table:display="true">
            <text:p>To level location information.</text:p>
            <text:p>Normally it is a station/plant name.</text:p>
          </table:help-message>
          <table:error-message table:message-type="stop" table:display="true"/>
        </table:content-validation>
        <table:content-validation table:name="val10" table:condition="of:cell-content-is-in-list([.$H$2:.$H$101977])" table:allow-empty-cell="true" table:display-list="unsorted" table:base-cell-address="defs.H1">
          <table:help-message table:title="group2" table:display="true">
            <text:p>Level2 location information.</text:p>
            <text:p>Like Bay, area or section.</text:p>
          </table:help-message>
        </table:content-validation>
        <table:content-validation table:name="val11" table:base-cell-address="defs.I2">
          <table:help-message table:title="group3" table:display="true">
            <text:p>Level3 location information.</text:p>
            <text:p>Like equipment, or device name.</text:p>
          </table:help-message>
          <table:error-message table:message-type="stop" table:display="true"/>
        </table:content-validation>
        <table:content-validation table:name="val12" table:condition="of:cell-content-is-decimal-number() and cell-content()&gt;-999999999999999" table:allow-empty-cell="true" table:base-cell-address="defs.J1">
          <table:help-message table:title="valueDefault" table:display="true">
            <text:p>Default numeric value.</text:p>
          </table:help-message>
          <table:error-message table:message-type="stop" table:display="true"/>
        </table:content-validation>
        <table:content-validation table:name="val13" table:condition="of:cell-content-is-whole-number() and cell-content-is-between(0,9)" table:allow-empty-cell="true" table:base-cell-address="defs.K1">
          <table:help-message table:title="priority" table:display="true">
            <text:p>Whole number, 1 digit.</text:p>
            <text:p>0 is the highest pripority.</text:p>
            <text:p>9 is the lowest.</text:p>
            <text:p>Recommended use of 0,1,2,3.</text:p>
          </table:help-message>
          <table:error-message table:message-type="stop" table:display="true"/>
        </table:content-validation>
        <table:content-validation table:name="val14" table:condition="of:cell-content-is-whole-number() and cell-content-is-between(0,9.99999999999999E+015)" table:allow-empty-cell="true" table:base-cell-address="defs.L1">
          <table:help-message table:title="frozenDetectTimeout" table:display="true">
            <text:p>Time in seconds to detect analog measurement not changing.</text:p>
          </table:help-message>
          <table:error-message table:message-type="stop" table:display="true"/>
        </table:content-validation>
        <table:content-validation table:name="val15" table:condition="of:cell-content-is-whole-number() and cell-content-is-between(0,9.99999999999999E+015)" table:allow-empty-cell="true" table:base-cell-address="defs.M1">
          <table:help-message table:title="invalidDetectTimeout" table:display="true">
            <text:p>Time in seconds to mark point value as </text:p>
            <text:p>invalid when not being updated.</text:p>
          </table:help-message>
          <table:error-message table:message-type="stop" table:display="true"/>
        </table:content-validation>
        <table:content-validation table:name="val16" table:condition="of:cell-content-is-decimal-number() and cell-content-is-between(0,9.99999999999999E+016)" table:allow-empty-cell="true" table:base-cell-address="defs.N1">
          <table:help-message table:title="historianDeadBand" table:display="true">
            <text:p>Deadband for registering analog data update to the historian.</text:p>
          </table:help-message>
          <table:error-message table:message-type="stop" table:display="true"/>
        </table:content-validation>
        <table:content-validation table:name="val17" table:condition="of:cell-content-is-whole-number() and cell-content-is-between(0,9.99999999999999E+015)" table:allow-empty-cell="true" table:base-cell-address="defs.O1">
          <table:help-message table:title="historianPeriod" table:display="true">
            <text:p>Period in seconds for integrity update to the historian.</text:p>
          </table:help-message>
          <table:error-message table:message-type="stop" table:display="true"/>
        </table:content-validation>
        <table:content-validation table:name="val18" table:condition="of:cell-content-is-whole-number() and cell-content-is-between(0,9.99999999999999E+015)" table:allow-empty-cell="true" table:base-cell-address="defs.P1">
          <table:help-message table:title="commandOfSupervised" table:display="true">
            <text:p>_id of the reciprocal command point of a supervised point.</text:p>
          </table:help-message>
          <table:error-message table:message-type="stop" table:display="true"/>
        </table:content-validation>
        <table:content-validation table:name="val19" table:condition="of:cell-content-is-whole-number() and cell-content-is-between(0,9.99999999999999E+015)" table:allow-empty-cell="true" table:base-cell-address="defs.Q1">
          <table:help-message table:title="supervisedOfCommand" table:display="true">
            <text:p>_id of the reciprocal supervised point of a command point.</text:p>
          </table:help-message>
          <table:error-message table:message-type="stop" table:display="true"/>
        </table:content-validation>
        <table:content-validation table:name="val20" table:base-cell-address="defs.R1">
          <table:help-message table:title="location" table:display="true">
            <text:p>Must be valid JSON, GeoJSON object.</text:p>
            <text:p>Leave blank or {} when not used.</text:p>
          </table:help-message>
          <table:error-message table:message-type="stop" table:display="true"/>
        </table:content-validation>
        <table:content-validation table:name="val21" table:condition="of:cell-content-is-in-list([$defs.$C$1:.$C$2])" table:allow-empty-cell="true" table:display-list="unsorted" table:base-cell-address="defs.S1">
          <table:help-message table:title="isEvent" table:display="true">
            <text:p>Mark as TRUE only if a digital tag that will report OFF to ON (0 to 1) transitions.</text:p>
          </table:help-message>
          <table:error-message table:message-type="stop" table:display="true"/>
        </table:content-validation>
        <table:content-validation table:name="val22" table:base-cell-address="defs.T1">
          <table:help-message table:title="unit" table:display="true">
            <text:p>Unit of measurement for analog points.</text:p>
          </table:help-message>
          <table:error-message table:message-type="stop" table:display="true"/>
        </table:content-validation>
        <table:content-validation table:name="val23" table:condition="of:cell-content-is-in-list([$defs.$D$1:.$D$4])" table:allow-empty-cell="true" table:display-list="unsorted" table:base-cell-address="defs.U1">
          <table:help-message table:title="Alarms State" table:display="true">
            <text:p>-1 for no alarmed state</text:p>
            <text:p>0 for alarmed at OFF state (0), persistent</text:p>
            <text:p>1 for alarmed at ON state (1), persistent</text:p>
            <text:p>2 for alarm at both states, not persistent</text:p>
            <text:p>Persistent alarms will appear on the list while active even after acknowledged.</text:p>
          </table:help-message>
          <table:error-message table:message-type="stop" table:display="true"/>
        </table:content-validation>
        <table:content-validation table:name="val24" table:base-cell-address="defs.V1">
          <table:help-message table:title="stateTextTrue" table:display="true">
            <text:p>Text for the ON/TRUE state of digital supervised points.</text:p>
            <text:p>Text for the ON/TRUE command of digital command action.</text:p>
          </table:help-message>
          <table:error-message table:message-type="stop" table:display="true"/>
        </table:content-validation>
        <table:content-validation table:name="val25" table:base-cell-address="defs.W1">
          <table:help-message table:title="stateTextFalse" table:display="true">
            <text:p>Text for the OFF/FALSE state of digital supervised points.</text:p>
            <text:p>Text for the OFF/FALSE command of digital command action.</text:p>
          </table:help-message>
          <table:error-message table:message-type="stop" table:display="true"/>
        </table:content-validation>
        <table:content-validation table:name="val26" table:base-cell-address="defs.X1">
          <table:help-message table:title="eventTextTrue" table:display="true">
            <text:p>Text for the ON/TRUE event (state change) of digital supervised points.</text:p>
            <text:p>Text for the ON/TRUE event of digital command action.</text:p>
          </table:help-message>
          <table:error-message table:message-type="stop" table:display="true"/>
        </table:content-validation>
        <table:content-validation table:name="val27" table:base-cell-address="defs.Y1">
          <table:help-message table:title="eventTextFalse" table:display="true">
            <text:p>Text for the OFF/FALSE event (state change) of digital supervised points.</text:p>
            <text:p>Text for the OFF/FALSE event of digital command action.</text:p>
          </table:help-message>
          <table:error-message table:message-type="stop" table:display="true"/>
        </table:content-validation>
        <table:content-validation table:name="val28" table:condition="of:cell-content-is-whole-number() and cell-content-is-between(0,999999999)" table:allow-empty-cell="true" table:base-cell-address="defs.Z1">
          <table:help-message table:title="Formula code" table:display="true">
            <text:p>Meaningful only for origin=calculated.</text:p>
            <text:p>Refer to documentation for valid formula codes</text:p>
          </table:help-message>
          <table:error-message table:message-type="stop" table:title="Invalid Code" table:display="true">
            <text:p>Must be a whole number!</text:p>
          </table:error-message>
        </table:content-validation>
        <table:content-validation table:name="val29" table:base-cell-address="defs.AA1">
          <table:help-message table:title="Parcels of formula calculation" table:display="true">
            <text:p>Meaningful only for origin=calculated.</text:p>
            <text:p>Must be a valid JSON array.</text:p>
            <text:p>Elements are _id of parcel points.</text:p>
            <text:p>e.g.</text:p>
            <text:p>[12, 223, 44]</text:p>
          </table:help-message>
          <table:error-message table:message-type="stop" table:title="Parcels" table:display="true"/>
        </table:content-validation>
        <table:content-validation table:name="val30" table:condition="of:cell-content-is-decimal-number() and cell-content()&gt;-99999999999" table:allow-empty-cell="true" table:base-cell-address="defs.AB1">
          <table:help-message table:title="kconv1" table:display="true">
            <text:p>Conversion factor multiplier for analog point value.</text:p>
          </table:help-message>
          <table:error-message table:message-type="stop" table:display="true"/>
        </table:content-validation>
        <table:content-validation table:name="val31" table:condition="of:cell-content-is-decimal-number() and cell-content()&gt;-999999999999" table:allow-empty-cell="true" table:base-cell-address="defs.AC1">
          <table:help-message table:title="kconv2" table:display="true">
            <text:p>Conversion factor offset for analog point value.</text:p>
          </table:help-message>
          <table:error-message table:message-type="stop" table:display="true"/>
        </table:content-validation>
        <table:content-validation table:name="val32" table:condition="of:cell-content-is-decimal-number() and cell-content-is-between(0,9999999999999)" table:allow-empty-cell="true" table:base-cell-address="defs.AD1">
          <table:help-message table:title="zeroDeadBand" table:display="true">
            <text:p>Minimum absolute value for analog point value below that it is considered zero.</text:p>
          </table:help-message>
          <table:error-message table:message-type="stop" table:display="true"/>
        </table:content-validation>
        <table:content-validation table:name="val33" table:condition="of:cell-content-is-in-list([$connections.$D$11:.$D100004])" table:allow-empty-cell="true" table:display-list="unsorted" table:base-cell-address="defs.AE1">
          <table:help-message table:title="Protocol Source Connection" table:display="true">
            <text:p>Choose a protocol connection for the source of tag updates.</text:p>
            <text:p>Integer number.</text:p>
            <text:p>See list in "connections" sheet tab.</text:p>
          </table:help-message>
          <table:error-message table:message-type="stop" table:title="Protocol Source Connection" table:display="true">
            <text:p>Choose a valid integer number for a connecion.</text:p>
            <text:p>See list in "connections" sheet tab.</text:p>
          </table:error-message>
        </table:content-validation>
        <table:content-validation table:name="val34" table:base-cell-address="defs.AF1">
          <table:help-message table:title="protocolSourceCommonAddress" table:display="true">
            <text:p>Common address for protocol data source.</text:p>
            <text:p>See specific protocol docs.</text:p>
          </table:help-message>
          <table:error-message table:message-type="stop" table:display="true"/>
        </table:content-validation>
        <table:content-validation table:name="val35" table:base-cell-address="defs.AG1">
          <table:help-message table:title="protocolSourceObjectAddress" table:display="true">
            <text:p>Object address for protocol data source.</text:p>
            <text:p>See specific protocol docs.</text:p>
          </table:help-message>
          <table:error-message table:message-type="stop" table:display="true"/>
        </table:content-validation>
        <table:content-validation table:name="val36" table:base-cell-address="defs.AH1">
          <table:help-message table:title="protocolSourceASDU" table:display="true">
            <text:p>ASDU TI type for protocol data source.</text:p>
            <text:p>See specific protocol docs.</text:p>
          </table:help-message>
          <table:error-message table:message-type="stop" table:display="true"/>
        </table:content-validation>
        <table:content-validation table:name="val37" table:condition="of:cell-content-is-whole-number() and cell-content-is-between(0,99999999999999)" table:allow-empty-cell="true" table:base-cell-address="defs.AI1">
          <table:help-message table:title="protocolSourceCommandDuration" table:display="true">
            <text:p>Command duration parameter for protocol data source.</text:p>
            <text:p>See specific protocol docs.</text:p>
          </table:help-message>
          <table:error-message table:message-type="stop" table:display="true"/>
        </table:content-validation>
        <table:content-validation table:name="val38" table:condition="of:cell-content-is-in-list([$defs.$C$1:.$C$2])" table:allow-empty-cell="true" table:display-list="unsorted" table:base-cell-address="defs.AJ1">
          <table:help-message table:title="protocolSourceCommandUseSBO" table:display="true">
            <text:p>For commmand points define the use of select before operate option.</text:p>
            <text:p>See specific protocol docs.</text:p>
          </table:help-message>
          <table:error-message table:message-type="stop" table:display="true"/>
        </table:content-validation>
        <table:content-validation table:name="val39" table:base-cell-address="defs.AK1">
          <table:help-message table:title="protocolDestinations" table:display="true">
            <text:p>Define the way protocol server connections will make the point available.</text:p>
            <text:p>JSON array of objects with protocol properties.</text:p>
            <text:p>See specific protocol driver docs.</text:p>
          </table:help-message>
          <table:error-message table:message-type="stop" table:display="true"/>
        </table:content-validation>
        <table:content-validation table:name="val40" table:condition="of:cell-content-is-decimal-number() and cell-content()!=-0.000012345" table:allow-empty-cell="true" table:base-cell-address="defs.AL1">
          <table:help-message table:title="hiLimit" table:display="true">
            <text:p>First level of out-of-range detection.</text:p>
          </table:help-message>
          <table:error-message table:message-type="stop" table:display="true"/>
        </table:content-validation>
        <table:content-validation table:name="val41" table:condition="of:cell-content-is-decimal-number() and cell-content()!=-0.000000012345" table:allow-empty-cell="true" table:base-cell-address="defs.AM1">
          <table:help-message table:title="hihiLimit" table:display="true">
            <text:p>Second level of out-of-range detection.</text:p>
          </table:help-message>
          <table:error-message table:message-type="stop" table:display="true"/>
        </table:content-validation>
        <table:content-validation table:name="val42" table:condition="of:cell-content-is-decimal-number() and cell-content()!=-0.0000000012345" table:allow-empty-cell="true" table:base-cell-address="defs.AN1">
          <table:help-message table:title="hihihiLimit" table:display="true">
            <text:p>Third level of out-of-range detection.</text:p>
          </table:help-message>
          <table:error-message table:message-type="stop" table:display="true"/>
        </table:content-validation>
        <table:content-validation table:name="val43" table:condition="of:cell-content-is-decimal-number() and cell-content()!=0.000000012345" table:allow-empty-cell="true" table:base-cell-address="defs.AO1">
          <table:help-message table:title="loLimit" table:display="true">
            <text:p>First level of out-of-range detection.</text:p>
          </table:help-message>
          <table:error-message table:message-type="stop" table:display="true"/>
        </table:content-validation>
        <table:content-validation table:name="val44" table:condition="of:cell-content-is-decimal-number() and cell-content()!=0.000000012345" table:allow-empty-cell="true" table:base-cell-address="defs.AP1">
          <table:help-message table:title="loloLimit" table:display="true">
            <text:p>Second level of out-of-range detection.</text:p>
          </table:help-message>
          <table:error-message table:message-type="stop" table:display="true"/>
        </table:content-validation>
        <table:content-validation table:name="val45" table:condition="of:cell-content-is-decimal-number() and cell-content()!=0.000000012345" table:allow-empty-cell="true" table:base-cell-address="defs.AQ1">
          <table:help-message table:title="lololoLimit" table:display="true">
            <text:p>Third level of out-of-range detection.</text:p>
          </table:help-message>
          <table:error-message table:message-type="stop" table:display="true"/>
        </table:content-validation>
        <table:content-validation table:name="val46" table:condition="of:cell-content-is-decimal-number() and cell-content()&gt;=0" table:allow-empty-cell="true" table:base-cell-address="defs.AR1">
          <table:help-message table:title="hysteresis" table:display="true">
            <text:p>Hysteresis for out-of-range detection.</text:p>
          </table:help-message>
          <table:error-message table:message-type="stop" table:display="true"/>
        </table:content-validation>
        <table:content-validation table:name="val47" table:condition="of:cell-content-is-in-list([$defs.$C$1:.$C$2])" table:allow-empty-cell="true" table:display-list="unsorted" table:base-cell-address="defs.AS1">
          <table:help-message table:title="alarmDisabled" table:display="true">
            <text:p>Disable alarms when true for the point.</text:p>
          </table:help-message>
          <table:error-message table:message-type="stop" table:display="true"/>
        </table:content-validation>
        <table:content-validation table:name="val48" table:condition="of:cell-content-is-in-list([$defs.$C$1:.$C$2])" table:allow-empty-cell="true" table:display-list="unsorted" table:base-cell-address="defs.AT1">
          <table:help-message table:title="commandBlocked" table:display="true">
            <text:p>Block send commands when true for the point.</text:p>
          </table:help-message>
          <table:error-message table:message-type="stop" table:display="true"/>
        </table:content-validation>
        <table:content-validation table:name="val49" table:base-cell-address="defs.AU1">
          <table:help-message table:title="commissioningRemarks" table:display="true">
            <text:p>Document comments for the point testing, validation, etc.</text:p>
          </table:help-message>
          <table:error-message table:message-type="stop" table:display="true"/>
        </table:content-validation>
        <table:content-validation table:name="val50" table:condition="of:cell-content-is-in-list([$defs.$C$1:.$C$2])" table:allow-empty-cell="true" table:display-list="unsorted" table:base-cell-address="defs.AV1">
          <table:help-message table:title="protocolSourceDiscardOldest" table:display="true">
            <text:p>Discard oldest data when sampling queue is full. See protocol documentation</text:p>
          </table:help-message>
          <table:error-message table:message-type="stop" table:display="true"/>
        </table:content-validation>
        <table:content-validation table:name="val51" table:condition="of:cell-content-is-whole-number() and cell-content()&gt;=-1" table:allow-empty-cell="true" table:base-cell-address="defs.AW1">
          <table:help-message table:title="protocolSourcePublishingInterval" table:display="true">
            <text:p>Publishing interval in seconds. See protocol documentation.</text:p>
          </table:help-message>
          <table:error-message table:message-type="stop" table:display="true"/>
        </table:content-validation>
        <table:content-validation table:name="val52" table:condition="of:cell-content-is-whole-number() and cell-content()&gt;=0" table:allow-empty-cell="true" table:base-cell-address="defs.AX1">
          <table:help-message table:title="protocolSourceQueueSize" table:display="true">
            <text:p>Queue size for data sampling/publishing. See protocol documentation.</text:p>
          </table:help-message>
          <table:error-message table:message-type="stop" table:display="true"/>
        </table:content-validation>
        <table:content-validation table:name="val53" table:condition="of:cell-content-is-whole-number() and cell-content()&gt;=0" table:allow-empty-cell="true" table:base-cell-address="defs.AY1">
          <table:help-message table:title="protocolSourceSamplingInterval" table:display="true">
            <text:p>Sampling interval in seconds. See protocol documentation.</text:p>
          </table:help-message>
          <table:error-message table:message-type="stop" table:display="true"/>
        </table:content-validation>
      </table:content-validations>
      <table:table table:name="JSON-SCADA Config"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Write Tags"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home/jsonscada/Desktop/json-scada-config.ods/content.xml"/>
              </form:properties>
              <office:event-listeners>
                <script:event-listener script:language="ooo:script" script:event-name="form:performaction" xlink:href="vnd.sun.star.script:VBAProject.WriteData.UpdateRtData_Click?language=Basic&amp;location=document" xlink:type="simple"/>
              </office:event-listeners>
            </form:button>
          </form:form>
        </office:forms>
        <table:table-column table:style-name="co10"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6" table:default-cell-style-name="Default"/>
        <table:table-column table:style-name="co16" table:default-cell-style-name="ce11"/>
        <table:table-column table:style-name="co6" table:number-columns-repeated="16377"/>
        <table:table-row table:style-name="ro1">
          <table:table-cell>
            <draw:frame draw:z-index="0" draw:name="Graphic 3" draw:style-name="gr1" draw:text-style-name="P1" svg:width="6.202cm" svg:height="1.502cm" svg:x="0.782cm" svg:y="0.414cm">
              <draw:image xlink:href="Pictures/100048C7000067A6000020304405CD39.svg" xlink:type="simple" xlink:show="embed" xlink:actuate="onLoad" draw:mime-type="image/svg+xml">
                <text:p/>
              </draw:image>
              <draw:image xlink:href="Pictures/10000001000004F50000018A915B2E95.png" xlink:type="simple" xlink:show="embed" xlink:actuate="onLoad" draw:mime-type="image/png"/>
            </draw:frame>
          </table:table-cell>
          <table:table-cell table:number-columns-repeated="6"/>
          <table:table-cell table:style-name="Default" table:number-columns-repeated="16377"/>
        </table:table-row>
        <table:table-row table:style-name="ro1">
          <table:table-cell table:number-columns-repeated="7"/>
          <table:table-cell table:style-name="Default" table:number-columns-repeated="16377"/>
        </table:table-row>
        <table:table-row table:style-name="ro1">
          <table:table-cell table:number-columns-repeated="3"/>
          <table:table-cell table:style-name="ce4" office:value-type="string" calcext:value-type="string">
            <text:p>127.0.0.1:10001</text:p>
          </table:table-cell>
          <table:table-cell table:style-name="ce6"/>
          <table:table-cell table:style-name="ce11" office:value-type="string" calcext:value-type="string">
            <text:p>Server address:port <text:s text:c="2"/>(Default local server = 127.0.0.1:10001)</text:p>
          </table:table-cell>
          <table:table-cell/>
          <table:table-cell table:style-name="Default" table:number-columns-repeated="16377"/>
        </table:table-row>
        <table:table-row table:style-name="ro1">
          <table:table-cell table:number-columns-repeated="3"/>
          <table:table-cell table:style-name="ce5">
            <draw:frame draw:z-index="1" draw:name="Graphic 2" draw:style-name="gr1" draw:text-style-name="P1" svg:width="1.099cm" svg:height="1.064cm" svg:x="1.838cm" svg:y="0.306cm">
              <draw:image xlink:href="Pictures/1000021E00000A0600000A067955A2F2.svg" xlink:type="simple" xlink:show="embed" xlink:actuate="onLoad" draw:mime-type="image/svg+xml">
                <text:p/>
              </draw:image>
              <draw:image xlink:href="Pictures/10000001000000C2000000C27D3E5B17.png" xlink:type="simple" xlink:show="embed" xlink:actuate="onLoad" draw:mime-type="image/png"/>
              <office:event-listeners>
                <script:event-listener script:language="ooo:script" script:event-name="dom:click" xlink:href="vnd.sun.star.script:VBAProject.ReadData.ReadRtData_Click?language=Basic&amp;location=document" xlink:type="simple"/>
              </office:event-listeners>
              <svg:desc>Repeat with solid fill</svg:desc>
            </draw:frame>
          </table:table-cell>
          <table:table-cell table:number-columns-repeated="3"/>
          <table:table-cell table:style-name="Default" table:number-columns-repeated="16377"/>
        </table:table-row>
        <table:table-row table:style-name="ro3">
          <table:table-cell table:style-name="ce2" office:value-type="string" calcext:value-type="string">
            <text:p>Configurator Worksheet v1.03</text:p>
          </table:table-cell>
          <table:table-cell table:number-columns-repeated="4"/>
          <table:table-cell table:style-name="ce11" office:value-type="string" calcext:value-type="string">
            <text:p><text:span text:style-name="T1">Refresh Tags (read tags from server, overwrite locally edited </text:span><text:span text:style-name="T2">tags</text:span><text:span text:style-name="T3"> sheet)</text:span></text:p>
          </table:table-cell>
          <table:table-cell/>
          <table:table-cell table:style-name="Default" table:number-columns-repeated="16377"/>
        </table:table-row>
        <table:table-row table:style-name="ro1">
          <table:table-cell office:value-type="string" calcext:value-type="string">
            <text:p>Requires config_server_for_excel service running.</text:p>
          </table:table-cell>
          <table:table-cell table:number-columns-repeated="2"/>
          <table:table-cell>
            <draw:frame draw:z-index="2" draw:name="Graphic 4" draw:style-name="gr1" draw:text-style-name="P1" svg:width="1.099cm" svg:height="1.046cm" svg:x="1.881cm" svg:y="0.3cm">
              <draw:image xlink:href="Pictures/1000021E00000A0600000A067955A2F2.svg" xlink:type="simple" xlink:show="embed" xlink:actuate="onLoad" draw:mime-type="image/svg+xml">
                <text:p/>
              </draw:image>
              <draw:image xlink:href="Pictures/10000001000000C2000000C27D3E5B17.png" xlink:type="simple" xlink:show="embed" xlink:actuate="onLoad" draw:mime-type="image/png"/>
              <office:event-listeners>
                <script:event-listener script:language="ooo:script" script:event-name="dom:click" xlink:href="vnd.sun.star.script:VBAProject.ReadData.ReadConnections_Click?language=Basic&amp;location=document" xlink:type="simple"/>
              </office:event-listeners>
              <svg:desc>Repeat with solid fill</svg:desc>
            </draw:frame>
          </table:table-cell>
          <table:table-cell table:number-columns-repeated="3"/>
          <table:table-cell table:style-name="Default" table:number-columns-repeated="16377"/>
        </table:table-row>
        <table:table-row table:style-name="ro1">
          <table:table-cell table:number-columns-repeated="5"/>
          <table:table-cell table:style-name="ce11" office:value-type="string" calcext:value-type="string">
            <text:p>Refresh Connections</text:p>
          </table:table-cell>
          <table:table-cell/>
          <table:table-cell table:style-name="Default" table:number-columns-repeated="16377"/>
        </table:table-row>
        <table:table-row table:style-name="ro1">
          <table:table-cell office:value-type="string" calcext:value-type="string">
            <text:p>Use the refresh buttons to load data from the json:scada server.</text:p>
          </table:table-cell>
          <table:table-cell table:number-columns-repeated="6"/>
          <table:table-cell table:style-name="Default" table:number-columns-repeated="16377"/>
        </table:table-row>
        <table:table-row table:style-name="ro5">
          <table:table-cell office:value-type="string" calcext:value-type="string">
            <text:p><text:span text:style-name="T1">Edit the </text:span><text:span text:style-name="T2">tags</text:span><text:span text:style-name="T3"> sheet.</text:span></text:p>
          </table:table-cell>
          <table:table-cell table:number-columns-repeated="2"/>
          <table:table-cell>
            <draw:frame draw:z-index="3" draw:name="Graphic 6" draw:style-name="gr1" draw:text-style-name="P1" svg:width="1.099cm" svg:height="1.047cm" svg:x="1.913cm" svg:y="0.227cm">
              <draw:image xlink:href="Pictures/1000021E00000A0600000A067955A2F2.svg" xlink:type="simple" xlink:show="embed" xlink:actuate="onLoad" draw:mime-type="image/svg+xml">
                <text:p/>
              </draw:image>
              <draw:image xlink:href="Pictures/10000001000000C2000000C27D3E5B17.png" xlink:type="simple" xlink:show="embed" xlink:actuate="onLoad" draw:mime-type="image/png"/>
              <office:event-listeners>
                <script:event-listener script:language="ooo:script" script:event-name="dom:click" xlink:href="vnd.sun.star.script:VBAProject.ReadData.ReadInstances_Click?language=Basic&amp;location=document" xlink:type="simple"/>
              </office:event-listeners>
              <svg:desc>Repeat with solid fill</svg:desc>
            </draw:frame>
          </table:table-cell>
          <table:table-cell table:number-columns-repeated="3"/>
          <table:table-cell table:style-name="Default" table:number-columns-repeated="16377"/>
        </table:table-row>
        <table:table-row table:style-name="ro1">
          <table:table-cell office:value-type="string" calcext:value-type="string">
            <text:p>Use the Write Tags button to write back to the server.</text:p>
          </table:table-cell>
          <table:table-cell table:number-columns-repeated="4"/>
          <table:table-cell table:style-name="ce11" office:value-type="string" calcext:value-type="string">
            <text:p>Refresh Driver Instances</text:p>
          </table:table-cell>
          <table:table-cell/>
          <table:table-cell table:style-name="Default" table:number-columns-repeated="16377"/>
        </table:table-row>
        <table:table-row table:style-name="ro1">
          <table:table-cell office:value-type="string" calcext:value-type="string">
            <text:p>Warning: when refreshed the tags data all editing is lost.</text:p>
          </table:table-cell>
          <table:table-cell table:number-columns-repeated="6"/>
          <table:table-cell table:style-name="Default" table:number-columns-repeated="16377"/>
        </table:table-row>
        <table:table-row table:style-name="ro1">
          <table:table-cell office:value-type="string" calcext:value-type="string">
            <text:p>Connections and driver instances are read only here.</text:p>
          </table:table-cell>
          <table:table-cell table:number-columns-repeated="6"/>
          <table:table-cell table:style-name="Default" table:number-columns-repeated="16377"/>
        </table:table-row>
        <table:table-row table:style-name="ro1">
          <table:table-cell table:number-columns-repeated="5"/>
          <table:table-cell table:style-name="ce11" office:value-type="string" calcext:value-type="string">
            <text:p>Write tags sheet back to json:scada server.</text:p>
          </table:table-cell>
          <table:table-cell/>
          <table:table-cell table:style-name="Default" table:number-columns-repeated="16377"/>
        </table:table-row>
        <table:table-row table:style-name="ro1">
          <table:table-cell table:style-name="ce3"/>
          <table:table-cell table:number-columns-repeated="2"/>
          <table:table-cell>
            <draw:control table:end-cell-address="'JSON-SCADA Config'.D15" table:end-x="3.946cm" table:end-y="0.04cm" draw:z-index="4" draw:style-name="gr2" draw:text-style-name="P2" svg:width="3.814cm" svg:height="0.527cm" svg:x="0.132cm" svg:y="0cm" draw:control="control1"/>
          </table:table-cell>
          <table:table-cell/>
          <table:table-cell table:style-name="ce11" office:value-type="string" calcext:value-type="string">
            <text:p>Edited tags are updated.</text:p>
          </table:table-cell>
          <table:table-cell/>
          <table:table-cell table:style-name="Default" table:number-columns-repeated="16377"/>
        </table:table-row>
        <table:table-row table:style-name="ro1">
          <table:table-cell table:number-columns-repeated="5"/>
          <table:table-cell table:style-name="ce11" office:value-type="string" calcext:value-type="string">
            <text:p>New tags are inserted.</text:p>
          </table:table-cell>
          <table:table-cell/>
          <table:table-cell table:style-name="Default" table:number-columns-repeated="16377"/>
        </table:table-row>
        <table:table-row table:style-name="ro1">
          <table:table-cell table:number-columns-repeated="5"/>
          <table:table-cell table:style-name="ce11" office:value-type="string" calcext:value-type="string">
            <text:p>Tags with empty tag name are deleted.</text:p>
          </table:table-cell>
          <table:table-cell/>
          <table:table-cell table:style-name="Default" table:number-columns-repeated="16377"/>
        </table:table-row>
        <table:table-row table:style-name="ro1">
          <table:table-cell table:number-columns-repeated="5"/>
          <table:table-cell table:style-name="ce11" office:value-type="string" calcext:value-type="string">
            <text:p>Tag names and _ids shoud not be repeated, duplicates are shown marked red.</text:p>
          </table:table-cell>
          <table:table-cell/>
          <table:table-cell table:style-name="Default" table:number-columns-repeated="16377"/>
        </table:table-row>
        <table:table-row table:style-name="ro6" table:number-rows-repeated="1048558">
          <table:table-cell table:number-columns-repeated="7"/>
          <table:table-cell table:style-name="Default" table:number-columns-repeated="16377"/>
        </table:table-row>
        <table:table-row table:style-name="ro6">
          <table:table-cell table:number-columns-repeated="7"/>
          <table:table-cell table:style-name="Default" table:number-columns-repeated="16377"/>
        </table:table-row>
      </table:table>
      <table:table table:name="tags" table:style-name="ta6">
        <office:forms form:automatic-focus="false" form:apply-design-mode="false"/>
        <table:table-column table:style-name="co17" table:default-cell-style-name="ce19"/>
        <table:table-column table:style-name="co18" table:default-cell-style-name="ce13"/>
        <table:table-column table:style-name="co19" table:default-cell-style-name="ce34"/>
        <table:table-column table:style-name="co17" table:default-cell-style-name="ce11"/>
        <table:table-column table:style-name="co11" table:default-cell-style-name="ce74"/>
        <table:table-column table:style-name="co20" table:default-cell-style-name="ce74"/>
        <table:table-column table:style-name="co21" table:default-cell-style-name="ce74"/>
        <table:table-column table:style-name="co11" table:default-cell-style-name="ce74"/>
        <table:table-column table:style-name="co22" table:default-cell-style-name="ce74"/>
        <table:table-column table:style-name="co23" table:default-cell-style-name="ce11"/>
        <table:table-column table:style-name="co24" table:default-cell-style-name="ce11"/>
        <table:table-column table:style-name="co25" table:default-cell-style-name="ce20"/>
        <table:table-column table:style-name="co26" table:default-cell-style-name="ce11"/>
        <table:table-column table:style-name="co27" table:default-cell-style-name="ce24"/>
        <table:table-column table:style-name="co28" table:default-cell-style-name="ce11"/>
        <table:table-column table:style-name="co29" table:default-cell-style-name="ce51"/>
        <table:table-column table:style-name="co29" table:default-cell-style-name="ce57"/>
        <table:table-column table:style-name="co30" table:default-cell-style-name="ce11"/>
        <table:table-column table:style-name="co31" table:default-cell-style-name="ce11"/>
        <table:table-column table:style-name="co32" table:default-cell-style-name="ce11"/>
        <table:table-column table:style-name="co33" table:default-cell-style-name="ce11"/>
        <table:table-column table:style-name="co35" table:default-cell-style-name="ce60"/>
        <table:table-column table:style-name="co36" table:default-cell-style-name="ce60"/>
        <table:table-column table:style-name="co35" table:default-cell-style-name="ce60"/>
        <table:table-column table:style-name="co36" table:default-cell-style-name="ce60"/>
        <table:table-column table:style-name="co37" table:default-cell-style-name="ce11"/>
        <table:table-column table:style-name="co38" table:default-cell-style-name="ce11"/>
        <table:table-column table:style-name="co24" table:number-columns-repeated="2" table:default-cell-style-name="ce11"/>
        <table:table-column table:style-name="co39" table:default-cell-style-name="ce11"/>
        <table:table-column table:style-name="co40" table:default-cell-style-name="ce11"/>
        <table:table-column table:style-name="co41" table:default-cell-style-name="ce11"/>
        <table:table-column table:style-name="co11" table:default-cell-style-name="ce11"/>
        <table:table-column table:style-name="co42" table:default-cell-style-name="ce11"/>
        <table:table-column table:style-name="co34" table:default-cell-style-name="ce75"/>
        <table:table-column table:style-name="co43" table:default-cell-style-name="ce75"/>
        <table:table-column table:style-name="co11" table:default-cell-style-name="ce74"/>
        <table:table-column table:style-name="co14" table:number-columns-repeated="3" table:default-cell-style-name="ce94"/>
        <table:table-column table:style-name="co44" table:number-columns-repeated="3" table:default-cell-style-name="ce94"/>
        <table:table-column table:style-name="co45" table:default-cell-style-name="ce139"/>
        <table:table-column table:style-name="co52" table:default-cell-style-name="ce11"/>
        <table:table-column table:style-name="co53" table:default-cell-style-name="ce11"/>
        <table:table-column table:style-name="co54" table:default-cell-style-name="ce74"/>
        <table:table-column table:style-name="co55" table:default-cell-style-name="ce56"/>
        <table:table-column table:style-name="co56" table:default-cell-style-name="ce58"/>
        <table:table-column table:style-name="co57" table:default-cell-style-name="ce58"/>
        <table:table-column table:style-name="co58" table:default-cell-style-name="ce58"/>
        <table:table-row table:style-name="ro1">
          <table:table-cell table:style-name="ce14" table:content-validation-name="val1"/>
          <table:table-cell table:style-name="ce37" table:content-validation-name="val3"/>
          <table:table-cell table:style-name="ce3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88"/>
          <table:table-cell table:style-name="ce87" table:content-validation-name="val12"/>
          <table:table-cell table:style-name="ce87" table:content-validation-name="val13"/>
          <table:table-cell table:style-name="ce37" table:content-validation-name="val14"/>
          <table:table-cell table:style-name="ce87" table:content-validation-name="val15"/>
          <table:table-cell table:style-name="ce108" table:content-validation-name="val16"/>
          <table:table-cell table:style-name="ce87" table:content-validation-name="val17"/>
          <table:table-cell table:style-name="ce37" table:content-validation-name="val18"/>
          <table:table-cell table:style-name="ce37" table:content-validation-name="val19"/>
          <table:table-cell table:style-name="ce87" table:content-validation-name="val20"/>
          <table:table-cell table:style-name="ce87" table:content-validation-name="val21"/>
          <table:table-cell table:style-name="ce87" table:content-validation-name="val22"/>
          <table:table-cell table:style-name="ce87" table:content-validation-name="val23"/>
          <table:table-cell table:style-name="ce96" table:content-validation-name="val24"/>
          <table:table-cell table:style-name="ce96" table:content-validation-name="val25"/>
          <table:table-cell table:style-name="ce96" table:content-validation-name="val26"/>
          <table:table-cell table:style-name="ce96" table:content-validation-name="val27"/>
          <table:table-cell table:style-name="ce87" table:content-validation-name="val28"/>
          <table:table-cell table:style-name="ce87" table:content-validation-name="val29"/>
          <table:table-cell table:style-name="ce87" table:content-validation-name="val30"/>
          <table:table-cell table:style-name="ce87" table:content-validation-name="val31"/>
          <table:table-cell table:style-name="ce87" table:content-validation-name="val32"/>
          <table:table-cell table:style-name="ce37" table:content-validation-name="val33"/>
          <table:table-cell table:style-name="ce87" table:content-validation-name="val34"/>
          <table:table-cell table:style-name="ce87" table:content-validation-name="val35"/>
          <table:table-cell table:style-name="ce87" table:content-validation-name="val36"/>
          <table:table-cell table:style-name="ce37" table:content-validation-name="val37"/>
          <table:table-cell table:style-name="ce37" table:content-validation-name="val38"/>
          <table:table-cell table:style-name="ce88" table:content-validation-name="val39"/>
          <table:table-cell table:style-name="ce143" table:content-validation-name="val40"/>
          <table:table-cell table:style-name="ce37" table:content-validation-name="val41"/>
          <table:table-cell table:style-name="ce37" table:content-validation-name="val42"/>
          <table:table-cell table:style-name="ce37" table:content-validation-name="val43"/>
          <table:table-cell table:style-name="ce37" table:content-validation-name="val44"/>
          <table:table-cell table:style-name="ce37" table:content-validation-name="val45"/>
          <table:table-cell table:style-name="ce108" table:content-validation-name="val46"/>
          <table:table-cell table:style-name="ce87" table:content-validation-name="val47"/>
          <table:table-cell table:style-name="ce87" table:content-validation-name="val48"/>
          <table:table-cell table:style-name="ce88" table:content-validation-name="val49"/>
          <table:table-cell table:style-name="ce99" table:content-validation-name="val50"/>
          <table:table-cell table:style-name="ce99" table:content-validation-name="val51"/>
          <table:table-cell table:style-name="ce99" table:content-validation-name="val52"/>
          <table:table-cell table:style-name="ce99" table:content-validation-name="val53"/>
        </table:table-row>
        <table:table-row table:style-name="ro1">
          <table:table-cell table:style-name="ce15" table:content-validation-name="val2"/>
          <table:table-cell table:style-name="ce28"/>
          <table:table-cell table:style-name="ce42" table:content-validation-name="val5"/>
          <table:table-cell table:style-name="ce88"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5" table:content-validation-name="val2"/>
          <table:table-cell table:style-name="ce30" table:content-validation-name="val3"/>
          <table:table-cell table:style-name="ce43" table:content-validation-name="val4"/>
          <table:table-cell table:style-name="ce88"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32" table:content-validation-name="val3"/>
          <table:table-cell table:style-name="ce44" table:content-validation-name="val4"/>
          <table:table-cell table:style-name="ce89" table:content-validation-name="val6"/>
          <table:table-cell table:style-name="ce73" table:number-columns-repeated="2"/>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112" table:content-validation-name="val41"/>
          <table:table-cell table:style-name="ce117" table:content-validation-name="val42"/>
          <table:table-cell table:style-name="ce110" table:content-validation-name="val43"/>
          <table:table-cell table:style-name="ce122" table:content-validation-name="val44"/>
          <table:table-cell table:style-name="ce125"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
          <table:table-cell table:style-name="ce15" table:content-validation-name="val2"/>
          <table:table-cell table:style-name="ce35" table:content-validation-name="val3"/>
          <table:table-cell table:style-name="ce43" table:content-validation-name="val4"/>
          <table:table-cell table:style-name="ce88" table:content-validation-name="val6"/>
          <table:table-cell table:style-name="ce126" table:number-columns-repeated="2"/>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2">
          <table:table-cell table:style-name="ce15" table:content-validation-name="val2"/>
          <table:table-cell table:style-name="ce30" table:content-validation-name="val3"/>
          <table:table-cell table:style-name="ce43" table:content-validation-name="val4"/>
          <table:table-cell table:style-name="ce88"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91">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84">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88" table:content-validation-name="val12"/>
          <table:table-cell table:style-name="ce88"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96"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88" table:content-validation-name="val28"/>
          <table:table-cell table:style-name="ce87" table:content-validation-name="val29"/>
          <table:table-cell table:style-name="ce96" table:content-validation-name="val30"/>
          <table:table-cell table:style-name="ce88" table:content-validation-name="val31"/>
          <table:table-cell table:style-name="ce96" table:content-validation-name="val32"/>
          <table:table-cell table:style-name="ce96" table:content-validation-name="val33"/>
          <table:table-cell table:style-name="ce88" table:content-validation-name="val34"/>
          <table:table-cell table:style-name="ce96" table:content-validation-name="val35"/>
          <table:table-cell table:style-name="ce96" table:content-validation-name="val36"/>
          <table:table-cell table:style-name="ce131" table:content-validation-name="val37"/>
          <table:table-cell table:style-name="ce140"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7">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71" table:content-validation-name="val46"/>
          <table:table-cell table:style-name="ce96" table:content-validation-name="val47"/>
          <table:table-cell table:style-name="ce96"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9" table:content-validation-name="val40"/>
          <table:table-cell table:style-name="ce152" table:content-validation-name="val41"/>
          <table:table-cell table:style-name="ce156" table:content-validation-name="val42"/>
          <table:table-cell table:style-name="ce161" table:content-validation-name="val43"/>
          <table:table-cell table:style-name="ce162" table:content-validation-name="val44"/>
          <table:table-cell table:style-name="ce166" table:content-validation-name="val45"/>
          <table:table-cell table:style-name="ce171" table:content-validation-name="val46"/>
          <table:table-cell table:style-name="ce96" table:content-validation-name="val47"/>
          <table:table-cell table:style-name="ce96"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71" table:content-validation-name="val46"/>
          <table:table-cell table:style-name="ce96" table:content-validation-name="val47"/>
          <table:table-cell table:style-name="ce96"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9" table:content-validation-name="val40"/>
          <table:table-cell table:style-name="ce152" table:content-validation-name="val41"/>
          <table:table-cell table:style-name="ce156" table:content-validation-name="val42"/>
          <table:table-cell table:style-name="ce161" table:content-validation-name="val43"/>
          <table:table-cell table:style-name="ce162" table:content-validation-name="val44"/>
          <table:table-cell table:style-name="ce166" table:content-validation-name="val45"/>
          <table:table-cell table:style-name="ce171" table:content-validation-name="val46"/>
          <table:table-cell table:style-name="ce96" table:content-validation-name="val47"/>
          <table:table-cell table:style-name="ce96"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96" table:content-validation-name="val12"/>
          <table:table-cell table:style-name="ce96"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87"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96" table:content-validation-name="val28"/>
          <table:table-cell table:style-name="ce87" table:content-validation-name="val29"/>
          <table:table-cell table:style-name="ce96" table:content-validation-name="val30"/>
          <table:table-cell table:style-name="ce96" table:content-validation-name="val31"/>
          <table:table-cell table:style-name="ce88" table:content-validation-name="val32"/>
          <table:table-cell table:style-name="ce96" table:content-validation-name="val33"/>
          <table:table-cell table:style-name="ce96" table:content-validation-name="val34"/>
          <table:table-cell table:style-name="ce96" table:content-validation-name="val35"/>
          <table:table-cell table:style-name="ce96" table:content-validation-name="val36"/>
          <table:table-cell table:style-name="ce129" table:content-validation-name="val37"/>
          <table:table-cell table:style-name="ce137"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71" table:content-validation-name="val46"/>
          <table:table-cell table:style-name="ce96" table:content-validation-name="val47"/>
          <table:table-cell table:style-name="ce96"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44">
          <table:table-cell table:style-name="ce15" table:content-validation-name="val2"/>
          <table:table-cell table:style-name="ce30" table:content-validation-name="val3"/>
          <table:table-cell table:style-name="ce47" table:content-validation-name="val4"/>
          <table:table-cell table:style-name="ce87" table:content-validation-name="val6"/>
          <table:table-cell table:style-name="ce88" table:content-validation-name="val7"/>
          <table:table-cell table:style-name="ce88" table:content-validation-name="val8"/>
          <table:table-cell table:style-name="ce88" table:content-validation-name="val9"/>
          <table:table-cell table:style-name="ce88" table:content-validation-name="val10"/>
          <table:table-cell table:style-name="ce96" table:content-validation-name="val11"/>
          <table:table-cell table:style-name="ce88" table:content-validation-name="val12"/>
          <table:table-cell table:style-name="ce88" table:content-validation-name="val13"/>
          <table:table-cell table:style-name="ce84" table:content-validation-name="val14"/>
          <table:table-cell table:style-name="ce96" table:content-validation-name="val15"/>
          <table:table-cell table:style-name="ce92" table:content-validation-name="val16"/>
          <table:table-cell table:style-name="ce96" table:content-validation-name="val17"/>
          <table:table-cell table:style-name="ce97" table:content-validation-name="val18"/>
          <table:table-cell table:style-name="ce105" table:content-validation-name="val19"/>
          <table:table-cell table:style-name="ce96" table:content-validation-name="val20"/>
          <table:table-cell table:style-name="ce96" table:content-validation-name="val21"/>
          <table:table-cell table:style-name="ce87" table:content-validation-name="val22"/>
          <table:table-cell table:style-name="ce96" table:content-validation-name="val23"/>
          <table:table-cell table:style-name="ce113" table:content-validation-name="val24"/>
          <table:table-cell table:style-name="ce119" table:content-validation-name="val25"/>
          <table:table-cell table:style-name="ce123" table:content-validation-name="val26"/>
          <table:table-cell table:style-name="ce127" table:content-validation-name="val27"/>
          <table:table-cell table:style-name="ce88" table:content-validation-name="val28"/>
          <table:table-cell table:style-name="ce87" table:content-validation-name="val29"/>
          <table:table-cell table:style-name="ce96" table:content-validation-name="val30"/>
          <table:table-cell table:style-name="ce88" table:content-validation-name="val31"/>
          <table:table-cell table:style-name="ce96" table:content-validation-name="val32"/>
          <table:table-cell table:style-name="ce96" table:content-validation-name="val33"/>
          <table:table-cell table:style-name="ce88" table:content-validation-name="val34"/>
          <table:table-cell table:style-name="ce96" table:content-validation-name="val35"/>
          <table:table-cell table:style-name="ce96" table:content-validation-name="val36"/>
          <table:table-cell table:style-name="ce131" table:content-validation-name="val37"/>
          <table:table-cell table:style-name="ce140" table:content-validation-name="val38"/>
          <table:table-cell table:style-name="ce88" table:content-validation-name="val39"/>
          <table:table-cell table:style-name="ce145" table:content-validation-name="val40"/>
          <table:table-cell table:style-name="ce152" table:content-validation-name="val41"/>
          <table:table-cell table:style-name="ce156" table:content-validation-name="val42"/>
          <table:table-cell table:style-name="ce159" table:content-validation-name="val43"/>
          <table:table-cell table:style-name="ce162" table:content-validation-name="val44"/>
          <table:table-cell table:style-name="ce166" table:content-validation-name="val45"/>
          <table:table-cell table:style-name="ce169" table:content-validation-name="val46"/>
          <table:table-cell table:style-name="ce88" table:content-validation-name="val47"/>
          <table:table-cell table:style-name="ce88" table:content-validation-name="val48"/>
          <table:table-cell table:style-name="ce88"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4">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112" table:content-validation-name="val41"/>
          <table:table-cell table:style-name="ce117" table:content-validation-name="val42"/>
          <table:table-cell table:style-name="ce110" table:content-validation-name="val43"/>
          <table:table-cell table:style-name="ce122" table:content-validation-name="val44"/>
          <table:table-cell table:style-name="ce125"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8">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0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4">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style-name="ce89"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6">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101" table:content-validation-name="val41"/>
          <table:table-cell table:style-name="ce104" table:content-validation-name="val42"/>
          <table:table-cell table:style-name="ce110" table:content-validation-name="val43"/>
          <table:table-cell table:style-name="ce115"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0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7">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67">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8">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5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4">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6">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4">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0">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101" table:content-validation-name="val41"/>
          <table:table-cell table:style-name="ce104" table:content-validation-name="val42"/>
          <table:table-cell table:style-name="ce110" table:content-validation-name="val43"/>
          <table:table-cell table:style-name="ce115"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4">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89" table:content-validation-name="val30"/>
          <table:table-cell table:style-name="ce99" table:content-validation-name="val31"/>
          <table:table-cell table:style-name="ce9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70"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9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275">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8">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style-name="ce99"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99" table:content-validation-name="val30"/>
          <table:table-cell table:style-name="ce89" table:content-validation-name="val31"/>
          <table:table-cell table:style-name="ce99" table:content-validation-name="val32"/>
          <table:table-cell table:style-name="ce99" table:content-validation-name="val33"/>
          <table:table-cell table:style-name="ce89" table:content-validation-name="val34"/>
          <table:table-cell table:style-name="ce99" table:content-validation-name="val35"/>
          <table:table-cell table:style-name="ce99" table:content-validation-name="val36"/>
          <table:table-cell table:style-name="ce70" table:content-validation-name="val37"/>
          <table:table-cell table:style-name="ce79"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9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613">
          <table:table-cell table:style-name="ce17"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99" table:content-validation-name="val12"/>
          <table:table-cell table:style-name="ce99" table:content-validation-name="val13"/>
          <table:table-cell table:style-name="ce39" table:content-validation-name="val14"/>
          <table:table-cell table:style-name="ce99" table:content-validation-name="val15"/>
          <table:table-cell table:style-name="ce45" table:content-validation-name="val16"/>
          <table:table-cell table:style-name="ce99" table:content-validation-name="val17"/>
          <table:table-cell table:style-name="ce48" table:content-validation-name="val18"/>
          <table:table-cell table:style-name="ce52" table:content-validation-name="val19"/>
          <table:table-cell table:content-validation-name="val20"/>
          <table:table-cell table:style-name="ce99" table:content-validation-name="val21"/>
          <table:table-cell table:content-validation-name="val22"/>
          <table:table-cell table:style-name="ce9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99" table:content-validation-name="val28"/>
          <table:table-cell table:content-validation-name="val29"/>
          <table:table-cell table:style-name="ce99" table:content-validation-name="val30"/>
          <table:table-cell table:style-name="ce99" table:content-validation-name="val31"/>
          <table:table-cell table:style-name="ce89" table:content-validation-name="val32"/>
          <table:table-cell table:style-name="ce99" table:content-validation-name="val33"/>
          <table:table-cell table:style-name="ce99" table:content-validation-name="val34"/>
          <table:table-cell table:style-name="ce99" table:content-validation-name="val35"/>
          <table:table-cell table:style-name="ce9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000">
          <table:table-cell table:style-name="ce18" table:content-validation-name="val2"/>
          <table:table-cell table:style-name="ce26" table:content-validation-name="val3"/>
          <table:table-cell table:style-name="ce33" table:content-validation-name="val4"/>
          <table:table-cell table:content-validation-name="val6"/>
          <table:table-cell table:style-name="ce89" table:content-validation-name="val7"/>
          <table:table-cell table:style-name="ce89" table:content-validation-name="val8"/>
          <table:table-cell table:style-name="ce89" table:content-validation-name="val9"/>
          <table:table-cell table:style-name="ce89" table:content-validation-name="val10"/>
          <table:table-cell table:style-name="ce99" table:content-validation-name="val11"/>
          <table:table-cell table:style-name="ce89" table:content-validation-name="val12"/>
          <table:table-cell table:style-name="ce89" table:content-validation-name="val13"/>
          <table:table-cell table:style-name="ce40" table:content-validation-name="val14"/>
          <table:table-cell table:style-name="ce89" table:content-validation-name="val15"/>
          <table:table-cell table:style-name="ce46" table:content-validation-name="val16"/>
          <table:table-cell table:style-name="ce89" table:content-validation-name="val17"/>
          <table:table-cell table:style-name="ce49" table:content-validation-name="val18"/>
          <table:table-cell table:style-name="ce53" table:content-validation-name="val19"/>
          <table:table-cell table:content-validation-name="val20"/>
          <table:table-cell table:style-name="ce89" table:content-validation-name="val21"/>
          <table:table-cell table:content-validation-name="val22"/>
          <table:table-cell table:style-name="ce89" table:content-validation-name="val23"/>
          <table:table-cell table:style-name="ce59" table:content-validation-name="val24"/>
          <table:table-cell table:style-name="ce63" table:content-validation-name="val25"/>
          <table:table-cell table:style-name="ce64" table:content-validation-name="val26"/>
          <table:table-cell table:style-name="ce68" table:content-validation-name="val27"/>
          <table:table-cell table:style-name="ce89" table:content-validation-name="val28"/>
          <table:table-cell table:content-validation-name="val29"/>
          <table:table-cell table:style-name="ce89" table:content-validation-name="val30"/>
          <table:table-cell table:style-name="ce89" table:content-validation-name="val31"/>
          <table:table-cell table:style-name="ce89" table:content-validation-name="val32"/>
          <table:table-cell table:style-name="ce99" table:content-validation-name="val33"/>
          <table:table-cell table:style-name="ce89" table:content-validation-name="val34"/>
          <table:table-cell table:style-name="ce89" table:content-validation-name="val35"/>
          <table:table-cell table:style-name="ce89" table:content-validation-name="val36"/>
          <table:table-cell table:style-name="ce69" table:content-validation-name="val37"/>
          <table:table-cell table:style-name="ce78" table:content-validation-name="val38"/>
          <table:table-cell table:style-name="ce89" table:content-validation-name="val39"/>
          <table:table-cell table:style-name="ce81" table:content-validation-name="val40"/>
          <table:table-cell table:style-name="ce98" table:content-validation-name="val41"/>
          <table:table-cell table:style-name="ce104" table:content-validation-name="val42"/>
          <table:table-cell table:style-name="ce110" table:content-validation-name="val43"/>
          <table:table-cell table:style-name="ce114" table:content-validation-name="val44"/>
          <table:table-cell table:style-name="ce120" table:content-validation-name="val45"/>
          <table:table-cell table:style-name="ce133" table:content-validation-name="val46"/>
          <table:table-cell table:style-name="ce89" table:content-validation-name="val47"/>
          <table:table-cell table:style-name="ce89" table:content-validation-name="val48"/>
          <table:table-cell table:style-name="ce89" table:content-validation-name="val49"/>
          <table:table-cell table:style-name="ce142" table:content-validation-name="val50"/>
          <table:table-cell table:style-name="ce144" table:content-validation-name="val51"/>
          <table:table-cell table:style-name="ce146" table:content-validation-name="val52"/>
          <table:table-cell table:style-name="ce147" table:content-validation-name="val53"/>
        </table:table-row>
        <table:table-row table:style-name="ro1" table:number-rows-repeated="1614">
          <table:table-cell table:style-name="ce18" table:content-validation-name="val2"/>
          <table:table-cell table:number-columns-repeated="8"/>
          <table:table-cell table:style-name="ce74" table:number-columns-repeated="2"/>
          <table:table-cell table:style-name="ce41"/>
          <table:table-cell table:style-name="ce74"/>
          <table:table-cell table:style-name="ce41"/>
          <table:table-cell table:style-name="ce74"/>
          <table:table-cell table:style-name="ce50"/>
          <table:table-cell table:style-name="ce55"/>
          <table:table-cell/>
          <table:table-cell table:style-name="ce74"/>
          <table:table-cell/>
          <table:table-cell table:style-name="ce74"/>
          <table:table-cell table:number-columns-repeated="4"/>
          <table:table-cell table:style-name="ce74"/>
          <table:table-cell/>
          <table:table-cell table:style-name="ce74" table:number-columns-repeated="7"/>
          <table:table-cell table:style-name="ce72" table:number-columns-repeated="2"/>
          <table:table-cell/>
          <table:table-cell table:style-name="ce90"/>
          <table:table-cell table:number-columns-repeated="2"/>
          <table:table-cell table:style-name="ce90"/>
          <table:table-cell table:number-columns-repeated="2"/>
          <table:table-cell table:style-name="ce90"/>
          <table:table-cell table:style-name="ce74" table:number-columns-repeated="2"/>
          <table:table-cell table:number-columns-repeated="5"/>
        </table:table-row>
        <table:table-row table:style-name="ro1" table:number-rows-repeated="4">
          <table:table-cell table:style-name="ce18" table:content-validation-name="val2"/>
          <table:table-cell table:number-columns-repeated="8"/>
          <table:table-cell table:style-name="ce74" table:number-columns-repeated="2"/>
          <table:table-cell table:style-name="ce41"/>
          <table:table-cell table:style-name="ce74"/>
          <table:table-cell table:style-name="ce41"/>
          <table:table-cell table:style-name="ce74"/>
          <table:table-cell table:style-name="ce50"/>
          <table:table-cell table:style-name="ce55"/>
          <table:table-cell/>
          <table:table-cell table:style-name="ce74"/>
          <table:table-cell/>
          <table:table-cell table:style-name="ce74"/>
          <table:table-cell table:number-columns-repeated="4"/>
          <table:table-cell table:style-name="ce74"/>
          <table:table-cell/>
          <table:table-cell table:style-name="ce74" table:number-columns-repeated="7"/>
          <table:table-cell table:style-name="ce72" table:number-columns-repeated="2"/>
          <table:table-cell/>
          <table:table-cell table:style-name="ce90" table:number-columns-repeated="7"/>
          <table:table-cell table:style-name="ce74" table:number-columns-repeated="2"/>
          <table:table-cell table:number-columns-repeated="5"/>
        </table:table-row>
        <table:table-row table:style-name="ro1" table:number-rows-repeated="5">
          <table:table-cell table:style-name="ce18" table:content-validation-name="val2"/>
          <table:table-cell table:number-columns-repeated="8"/>
          <table:table-cell table:style-name="ce74" table:number-columns-repeated="2"/>
          <table:table-cell table:style-name="ce41"/>
          <table:table-cell table:style-name="ce74"/>
          <table:table-cell table:style-name="ce41"/>
          <table:table-cell table:style-name="ce74"/>
          <table:table-cell table:style-name="ce50"/>
          <table:table-cell table:style-name="ce55"/>
          <table:table-cell/>
          <table:table-cell table:style-name="ce74"/>
          <table:table-cell/>
          <table:table-cell table:style-name="ce74"/>
          <table:table-cell table:number-columns-repeated="4"/>
          <table:table-cell table:style-name="ce74"/>
          <table:table-cell/>
          <table:table-cell table:style-name="ce74" table:number-columns-repeated="7"/>
          <table:table-cell table:style-name="ce72" table:number-columns-repeated="2"/>
          <table:table-cell/>
          <table:table-cell table:style-name="ce90"/>
          <table:table-cell table:number-columns-repeated="2"/>
          <table:table-cell table:style-name="ce90"/>
          <table:table-cell table:number-columns-repeated="2"/>
          <table:table-cell table:style-name="ce90"/>
          <table:table-cell table:style-name="ce74" table:number-columns-repeated="2"/>
          <table:table-cell table:number-columns-repeated="5"/>
        </table:table-row>
        <table:table-row table:style-name="ro1" table:number-rows-repeated="3">
          <table:table-cell table:content-validation-name="val2"/>
          <table:table-cell table:number-columns-repeated="8"/>
          <table:table-cell table:style-name="ce74" table:number-columns-repeated="2"/>
          <table:table-cell table:style-name="ce41"/>
          <table:table-cell table:style-name="ce74"/>
          <table:table-cell table:style-name="ce41"/>
          <table:table-cell table:style-name="ce74"/>
          <table:table-cell table:style-name="ce50"/>
          <table:table-cell table:style-name="ce55"/>
          <table:table-cell/>
          <table:table-cell table:style-name="ce74"/>
          <table:table-cell/>
          <table:table-cell table:style-name="ce74"/>
          <table:table-cell table:number-columns-repeated="4"/>
          <table:table-cell table:style-name="ce74"/>
          <table:table-cell/>
          <table:table-cell table:style-name="ce74" table:number-columns-repeated="2"/>
          <table:table-cell/>
          <table:table-cell table:style-name="ce74" table:number-columns-repeated="4"/>
          <table:table-cell table:number-columns-repeated="9"/>
          <table:table-cell table:style-name="ce90"/>
          <table:table-cell table:style-name="ce74" table:number-columns-repeated="2"/>
          <table:table-cell table:number-columns-repeated="5"/>
        </table:table-row>
        <table:table-row table:style-name="ro1" table:number-rows-repeated="1044232">
          <table:table-cell table:content-validation-name="val2"/>
          <table:table-cell table:number-columns-repeated="50"/>
        </table:table-row>
        <table:table-row table:style-name="ro1">
          <table:table-cell table:content-validation-name="val2"/>
          <table:table-cell table:number-columns-repeated="50"/>
        </table:table-row>
        <table:named-expressions>
          <table:named-range table:name="ExternalData_1" table:base-cell-address="$'JSON-SCADA Config'.$A$1" table:cell-range-address="$tags.$A$1:.$AY$6322" table:range-usable-as="hidden"/>
          <table:named-range table:name="_xlnm.Extract" table:base-cell-address="$'JSON-SCADA Config'.$A$1" table:cell-range-address="$tags.$BA:.$BA"/>
        </table:named-expressions>
        <calcext:conditional-formats>
          <calcext:conditional-format calcext:target-range-address="tags.AV2:tags.AV1048576">
            <calcext:condition calcext:apply-style-name="ConditionalStyle_5" calcext:value="formula-is([.$D2]&lt;&gt;&quot;supervised&quot;)" calcext:base-cell-address="tags.AV2"/>
          </calcext:conditional-format>
          <calcext:conditional-format calcext:target-range-address="tags.AY7:tags.AY1048576 tags.AY6:tags.AY6 tags.AW5:tags.AX1048576 tags.AY5:tags.AY5 tags.AW2:tags.AY4">
            <calcext:condition calcext:apply-style-name="ConditionalStyle_6" calcext:value="formula-is([.$D2]&lt;&gt;&quot;supervised&quot;)" calcext:base-cell-address="tags.AW2"/>
          </calcext:conditional-format>
          <calcext:conditional-format calcext:target-range-address="tags.A2:tags.A1048576">
            <calcext:condition calcext:apply-style-name="ConditionalStyle_12" calcext:value="formula-is(AND(ISBLANK([.B2]);NOT(ISBLANK([.A2]))))" calcext:base-cell-address="tags.A2"/>
            <calcext:condition calcext:apply-style-name="ConditionalStyle_13" calcext:value="duplicate" calcext:base-cell-address="tags.A2"/>
          </calcext:conditional-format>
          <calcext:conditional-format calcext:target-range-address="tags.L2:tags.L1048576 tags.N2:tags.N1048576">
            <calcext:condition calcext:apply-style-name="ConditionalStyle_16" calcext:value="formula-is([.$C2]=&quot;digital&quot;)" calcext:base-cell-address="tags.L2"/>
          </calcext:conditional-format>
          <calcext:conditional-format calcext:target-range-address="tags.B5:tags.B1048576 tags.B2:tags.B3">
            <calcext:condition calcext:apply-style-name="ConditionalStyle_18" calcext:value="duplicate" calcext:base-cell-address="tags.B2"/>
          </calcext:conditional-format>
          <calcext:conditional-format calcext:target-range-address="tags.C2:tags.C1048576">
            <calcext:condition calcext:apply-style-name="ConditionalStyle_8" calcext:value="formula-is([.$C$2]&lt;&gt;&quot;analog&quot;)" calcext:base-cell-address="tags.C2"/>
            <calcext:condition calcext:apply-style-name="ConditionalStyle_9" calcext:value="=&quot;digital&quot;" calcext:base-cell-address="tags.C2"/>
            <calcext:condition calcext:apply-style-name="ConditionalStyle_10" calcext:value="=&quot;analog&quot;" calcext:base-cell-address="tags.C2"/>
          </calcext:conditional-format>
          <calcext:conditional-format calcext:target-range-address="tags.AR5:tags.AR1048576 tags.AQ5:tags.AQ1048576 tags.AL2:tags.AR4 tags.AL5:tags.AP1048576">
            <calcext:condition calcext:apply-style-name="ConditionalStyle_7" calcext:value="formula-is([.$C2]&lt;&gt;&quot;analog&quot;)" calcext:base-cell-address="tags.AL2"/>
          </calcext:conditional-format>
          <calcext:conditional-format calcext:target-range-address="tags.Y5:tags.Y1048576 tags.X5:tags.X1048576 tags.V2:tags.Y4 tags.V5:tags.W1048576">
            <calcext:condition calcext:apply-style-name="ConditionalStyle_17" calcext:value="formula-is([.$C2]&lt;&gt;&quot;digital&quot;)" calcext:base-cell-address="tags.V2"/>
          </calcext:conditional-format>
          <calcext:conditional-format calcext:target-range-address="tags.Q2:tags.Q1048576">
            <calcext:condition calcext:apply-style-name="ConditionalStyle_14" calcext:value="formula-is([.$D2]&lt;&gt;&quot;command&quot;)" calcext:base-cell-address="tags.Q2"/>
          </calcext:conditional-format>
          <calcext:conditional-format calcext:target-range-address="tags.P2:tags.P1048576">
            <calcext:condition calcext:apply-style-name="ConditionalStyle_15" calcext:value="formula-is([.$D2]=&quot;command&quot;)" calcext:base-cell-address="tags.P2"/>
          </calcext:conditional-format>
          <calcext:conditional-format calcext:target-range-address="tags.AJ5:tags.AJ1048576 tags.AI5:tags.AI1048576 tags.AI2:tags.AJ4">
            <calcext:condition calcext:apply-style-name="ConditionalStyle_11" calcext:value="formula-is([.$D2]&lt;&gt;&quot;command&quot;)" calcext:base-cell-address="tags.AI2"/>
          </calcext:conditional-format>
          <calcext:conditional-format calcext:target-range-address="tags.A5:tags.A260 tags.A2:tags.A3">
            <calcext:condition calcext:apply-style-name="ConditionalStyle_12" calcext:value="formula-is(AND(ISBLANK([.B2]);NOT(ISBLANK([.A2]))))" calcext:base-cell-address="tags.A2"/>
            <calcext:condition calcext:apply-style-name="ConditionalStyle_13" calcext:value="duplicate" calcext:base-cell-address="tags.A2"/>
          </calcext:conditional-format>
          <calcext:conditional-format calcext:target-range-address="tags.L5:tags.L260 tags.N5:tags.N260 tags.L2:tags.L3 tags.N2:tags.N3">
            <calcext:condition calcext:apply-style-name="ConditionalStyle_16" calcext:value="formula-is([.$C2]=&quot;digital&quot;)" calcext:base-cell-address="tags.L2"/>
          </calcext:conditional-format>
          <calcext:conditional-format calcext:target-range-address="tags.B5:tags.B260 tags.B2:tags.B3">
            <calcext:condition calcext:apply-style-name="ConditionalStyle_18" calcext:value="duplicate" calcext:base-cell-address="tags.B2"/>
          </calcext:conditional-format>
          <calcext:conditional-format calcext:target-range-address="tags.AR5:tags.AR260 tags.AL2:tags.AR3 tags.AL5:tags.AQ260">
            <calcext:condition calcext:apply-style-name="ConditionalStyle_7" calcext:value="formula-is([.$C2]&lt;&gt;&quot;analog&quot;)" calcext:base-cell-address="tags.AL2"/>
          </calcext:conditional-format>
          <calcext:conditional-format calcext:target-range-address="tags.Y5:tags.Y260 tags.V2:tags.Y3 tags.V5:tags.X260">
            <calcext:condition calcext:apply-style-name="ConditionalStyle_17" calcext:value="formula-is([.$C2]&lt;&gt;&quot;digital&quot;)" calcext:base-cell-address="tags.V2"/>
          </calcext:conditional-format>
          <calcext:conditional-format calcext:target-range-address="tags.Q5:tags.Q260 tags.Q2:tags.Q3">
            <calcext:condition calcext:apply-style-name="ConditionalStyle_14" calcext:value="formula-is([.$D2]&lt;&gt;&quot;command&quot;)" calcext:base-cell-address="tags.Q2"/>
          </calcext:conditional-format>
          <calcext:conditional-format calcext:target-range-address="tags.P5:tags.P260 tags.P2:tags.P3">
            <calcext:condition calcext:apply-style-name="ConditionalStyle_15" calcext:value="formula-is([.$D2]=&quot;command&quot;)" calcext:base-cell-address="tags.P2"/>
          </calcext:conditional-format>
          <calcext:conditional-format calcext:target-range-address="tags.AJ5:tags.AJ260 tags.AI2:tags.AJ3 tags.AI5:tags.AI260">
            <calcext:condition calcext:apply-style-name="ConditionalStyle_11" calcext:value="formula-is([.$D2]&lt;&gt;&quot;command&quot;)" calcext:base-cell-address="tags.AI2"/>
          </calcext:conditional-format>
          <calcext:conditional-format calcext:target-range-address="tags.A5:tags.A260 tags.A2:tags.A3">
            <calcext:condition calcext:apply-style-name="ConditionalStyle_12" calcext:value="formula-is(AND(ISBLANK([.B2]);NOT(ISBLANK([.A2]))))" calcext:base-cell-address="tags.A2"/>
            <calcext:condition calcext:apply-style-name="ConditionalStyle_13" calcext:value="duplicate" calcext:base-cell-address="tags.A2"/>
          </calcext:conditional-format>
          <calcext:conditional-format calcext:target-range-address="tags.L5:tags.L260 tags.N5:tags.N260 tags.L2:tags.L3 tags.N2:tags.N3">
            <calcext:condition calcext:apply-style-name="ConditionalStyle_16" calcext:value="formula-is([.$C2]=&quot;digital&quot;)" calcext:base-cell-address="tags.L2"/>
          </calcext:conditional-format>
          <calcext:conditional-format calcext:target-range-address="tags.B7:tags.B260 tags.B2:tags.B3">
            <calcext:condition calcext:apply-style-name="ConditionalStyle_18" calcext:value="duplicate" calcext:base-cell-address="tags.B2"/>
          </calcext:conditional-format>
          <calcext:conditional-format calcext:target-range-address="tags.AL1:tags.AL3 tags.AL5:tags.AR260 tags.AM2:tags.AR3">
            <calcext:condition calcext:apply-style-name="ConditionalStyle_7" calcext:value="formula-is([.$C1]&lt;&gt;&quot;analog&quot;)" calcext:base-cell-address="tags.AL1"/>
          </calcext:conditional-format>
          <calcext:conditional-format calcext:target-range-address="tags.Y5:tags.Y260 tags.V2:tags.Y3 tags.V5:tags.X260">
            <calcext:condition calcext:apply-style-name="ConditionalStyle_17" calcext:value="formula-is([.$C2]&lt;&gt;&quot;digital&quot;)" calcext:base-cell-address="tags.V2"/>
          </calcext:conditional-format>
          <calcext:conditional-format calcext:target-range-address="tags.Q5:tags.Q260 tags.Q2:tags.Q3">
            <calcext:condition calcext:apply-style-name="ConditionalStyle_14" calcext:value="formula-is([.$D2]&lt;&gt;&quot;command&quot;)" calcext:base-cell-address="tags.Q2"/>
          </calcext:conditional-format>
          <calcext:conditional-format calcext:target-range-address="tags.P5:tags.P260 tags.P2:tags.P3">
            <calcext:condition calcext:apply-style-name="ConditionalStyle_15" calcext:value="formula-is([.$D2]=&quot;command&quot;)" calcext:base-cell-address="tags.P2"/>
          </calcext:conditional-format>
          <calcext:conditional-format calcext:target-range-address="tags.AJ5:tags.AJ260 tags.AI2:tags.AJ3 tags.AI5:tags.AI260">
            <calcext:condition calcext:apply-style-name="ConditionalStyle_11" calcext:value="formula-is([.$D2]&lt;&gt;&quot;command&quot;)" calcext:base-cell-address="tags.AI2"/>
          </calcext:conditional-format>
          <calcext:conditional-format calcext:target-range-address="tags.B4:tags.B6">
            <calcext:condition calcext:apply-style-name="ConditionalStyle_15" calcext:value="duplicate" calcext:base-cell-address="tags.B4"/>
          </calcext:conditional-format>
        </calcext:conditional-formats>
      </table:table>
      <table:table table:name="connections" table:style-name="ta3">
        <office:forms form:automatic-focus="false" form:apply-design-mode="false"/>
        <table:table-column table:style-name="co46" table:default-cell-style-name="ce11"/>
        <table:table-column table:style-name="co47" table:default-cell-style-name="ce11"/>
        <table:table-column table:style-name="co34" table:default-cell-style-name="ce11"/>
        <table:table-column table:style-name="co48" table:default-cell-style-name="ce11"/>
        <table:table-column table:style-name="co49" table:default-cell-style-name="ce11"/>
        <table:table-column table:style-name="co11" table:default-cell-style-name="ce11"/>
        <table:table-column table:style-name="co50" table:default-cell-style-name="ce11"/>
        <table:table-column table:style-name="co51" table:default-cell-style-name="ce11"/>
        <table:table-column table:style-name="co6" table:number-columns-repeated="16376"/>
        <table:table-row table:style-name="ro1">
          <table:table-cell table:style-name="ce210" office:value-type="string" calcext:value-type="string">
            <text:p>_id</text:p>
          </table:table-cell>
          <table:table-cell table:style-name="ce210" office:value-type="string" calcext:value-type="string">
            <text:p>protocolDriver</text:p>
          </table:table-cell>
          <table:table-cell table:style-name="ce210" office:value-type="string" calcext:value-type="string">
            <text:p>protocolDriverInstanceNumber</text:p>
          </table:table-cell>
          <table:table-cell table:style-name="ce210" office:value-type="string" calcext:value-type="string">
            <text:p>protocolConnectionNumber</text:p>
          </table:table-cell>
          <table:table-cell table:style-name="ce210" office:value-type="string" calcext:value-type="string">
            <text:p>name</text:p>
          </table:table-cell>
          <table:table-cell table:style-name="ce210" office:value-type="string" calcext:value-type="string">
            <text:p>description</text:p>
          </table:table-cell>
          <table:table-cell table:style-name="ce210" office:value-type="string" calcext:value-type="string">
            <text:p>enabled</text:p>
          </table:table-cell>
          <table:table-cell table:style-name="ce210" office:value-type="string" calcext:value-type="string">
            <text:p>commandsEnabled</text:p>
          </table:table-cell>
        </table:table-row>
        <table:table-row table:style-name="ro1">
          <table:table-cell office:value-type="string" calcext:value-type="string">
            <text:p>5f108e3e3d8adfd3eccb206e</text:p>
          </table:table-cell>
          <table:table-cell office:value-type="string" calcext:value-type="string">
            <text:p>IEC60870-5-104_SERVER</text:p>
          </table:table-cell>
          <table:table-cell table:style-name="ce89" office:value-type="string" calcext:value-type="string">
            <text:p>1</text:p>
          </table:table-cell>
          <table:table-cell table:style-name="ce89" office:value-type="string" calcext:value-type="string">
            <text:p>1001</text:p>
          </table:table-cell>
          <table:table-cell office:value-type="string" calcext:value-type="string">
            <text:p>IEC104DIST</text:p>
          </table:table-cell>
          <table:table-cell office:value-type="string" calcext:value-type="string">
            <text:p>Demo distribution of IEC 104</text:p>
          </table:table-cell>
          <table:table-cell table:number-columns-repeated="2" table:style-name="ce89" office:value-type="string" calcext:value-type="string">
            <text:p>true</text:p>
          </table:table-cell>
        </table:table-row>
        <table:table-row table:style-name="ro1">
          <table:table-cell office:value-type="string" calcext:value-type="string">
            <text:p>64f82e728e9caf34bb4960a9</text:p>
          </table:table-cell>
          <table:table-cell office:value-type="string" calcext:value-type="string">
            <text:p>IEC61850</text:p>
          </table:table-cell>
          <table:table-cell table:style-name="ce89" office:value-type="string" calcext:value-type="string">
            <text:p>1</text:p>
          </table:table-cell>
          <table:table-cell table:style-name="ce89" office:value-type="string" calcext:value-type="string">
            <text:p>3002</text:p>
          </table:table-cell>
          <table:table-cell table:number-columns-repeated="2" office:value-type="string" calcext:value-type="string">
            <text:p>RTU_RACK</text:p>
          </table:table-cell>
          <table:table-cell table:number-columns-repeated="2" table:style-name="ce89" office:value-type="string" calcext:value-type="string">
            <text:p>true</text:p>
          </table:table-cell>
        </table:table-row>
        <table:table-row table:style-name="ro1">
          <table:table-cell office:value-type="string" calcext:value-type="string">
            <text:p>650013ab64e8ddbf0ef3ea33</text:p>
          </table:table-cell>
          <table:table-cell office:value-type="string" calcext:value-type="string">
            <text:p>IEC61850</text:p>
          </table:table-cell>
          <table:table-cell table:style-name="ce89" office:value-type="string" calcext:value-type="string">
            <text:p>1</text:p>
          </table:table-cell>
          <table:table-cell table:style-name="ce89" office:value-type="string" calcext:value-type="string">
            <text:p>3001</text:p>
          </table:table-cell>
          <table:table-cell office:value-type="string" calcext:value-type="string">
            <text:p>RTU_MAIN</text:p>
          </table:table-cell>
          <table:table-cell office:value-type="string" calcext:value-type="string">
            <text:p>MAIN RTU</text:p>
          </table:table-cell>
          <table:table-cell table:number-columns-repeated="2" table:style-name="ce89" office:value-type="string" calcext:value-type="string">
            <text:p>true</text:p>
          </table:table-cell>
        </table:table-row>
        <table:table-row table:style-name="ro1">
          <table:table-cell office:value-type="string" calcext:value-type="string">
            <text:p>67de6a229c62de8d0280e5b4</text:p>
          </table:table-cell>
          <table:table-cell office:value-type="string" calcext:value-type="string">
            <text:p>TELEGRAF-LISTENER</text:p>
          </table:table-cell>
          <table:table-cell table:style-name="ce89" office:value-type="string" calcext:value-type="string">
            <text:p>1</text:p>
          </table:table-cell>
          <table:table-cell table:style-name="ce89" office:value-type="string" calcext:value-type="string">
            <text:p>3003</text:p>
          </table:table-cell>
          <table:table-cell office:value-type="string" calcext:value-type="string">
            <text:p>modbus</text:p>
          </table:table-cell>
          <table:table-cell office:value-type="string" calcext:value-type="string">
            <text:p>NEW CONNECTION</text:p>
          </table:table-cell>
          <table:table-cell table:number-columns-repeated="2" table:style-name="ce89" office:value-type="string" calcext:value-type="string">
            <text:p>true</text:p>
          </table:table-cell>
        </table:table-row>
        <table:table-row table:style-name="ro1">
          <table:table-cell office:value-type="string" calcext:value-type="string">
            <text:p>68be8660dbeeba65ec89d661</text:p>
          </table:table-cell>
          <table:table-cell office:value-type="string" calcext:value-type="string">
            <text:p>IEC60870-5-104</text:p>
          </table:table-cell>
          <table:table-cell table:style-name="ce89" office:value-type="string" calcext:value-type="string">
            <text:p>1</text:p>
          </table:table-cell>
          <table:table-cell table:style-name="ce89" office:value-type="string" calcext:value-type="string">
            <text:p>3004</text:p>
          </table:table-cell>
          <table:table-cell table:number-columns-repeated="2" office:value-type="string" calcext:value-type="string">
            <text:p>ldms</text:p>
          </table:table-cell>
          <table:table-cell table:number-columns-repeated="2" table:style-name="ce89" office:value-type="string" calcext:value-type="string">
            <text:p>true</text:p>
          </table:table-cell>
        </table:table-row>
        <table:table-row table:style-name="ro1">
          <table:table-cell office:value-type="string" calcext:value-type="string">
            <text:p>694255acaf169065a6ee4c84</text:p>
          </table:table-cell>
          <table:table-cell office:value-type="string" calcext:value-type="string">
            <text:p>IEC60870-5-104</text:p>
          </table:table-cell>
          <table:table-cell table:style-name="ce89" office:value-type="string" calcext:value-type="string">
            <text:p>1</text:p>
          </table:table-cell>
          <table:table-cell table:style-name="ce89" office:value-type="string" calcext:value-type="string">
            <text:p>3005</text:p>
          </table:table-cell>
          <table:table-cell office:value-type="string" calcext:value-type="string">
            <text:p>NEW_CONNECTION</text:p>
          </table:table-cell>
          <table:table-cell office:value-type="string" calcext:value-type="string">
            <text:p>NEW CONNECTION</text:p>
          </table:table-cell>
          <table:table-cell table:number-columns-repeated="2" table:style-name="ce89" office:value-type="string" calcext:value-type="string">
            <text:p>true</text:p>
          </table:table-cell>
        </table:table-row>
        <table:table-row table:style-name="ro1">
          <table:table-cell office:value-type="string" calcext:value-type="string">
            <text:p>6994148330d9027a8f3de764</text:p>
          </table:table-cell>
          <table:table-cell office:value-type="string" calcext:value-type="string">
            <text:p>IEC60870-5-104</text:p>
          </table:table-cell>
          <table:table-cell table:style-name="ce89" office:value-type="string" calcext:value-type="string">
            <text:p>1</text:p>
          </table:table-cell>
          <table:table-cell table:style-name="ce89" office:value-type="string" calcext:value-type="string">
            <text:p>3006</text:p>
          </table:table-cell>
          <table:table-cell office:value-type="string" calcext:value-type="string">
            <text:p>NEW_CONNECTION</text:p>
          </table:table-cell>
          <table:table-cell office:value-type="string" calcext:value-type="string">
            <text:p>NEW CONNECTION</text:p>
          </table:table-cell>
          <table:table-cell table:number-columns-repeated="2" table:style-name="ce89" office:value-type="string" calcext:value-type="string">
            <text:p>true</text:p>
          </table:table-cell>
        </table:table-row>
        <table:table-row table:style-name="ro1" table:number-rows-repeated="6">
          <table:table-cell table:number-columns-repeated="2"/>
          <table:table-cell table:style-name="ce89" table:number-columns-repeated="2"/>
          <table:table-cell table:number-columns-repeated="2"/>
          <table:table-cell table:style-name="ce89" table:number-columns-repeated="2"/>
        </table:table-row>
        <table:table-row table:style-name="ro1" table:number-rows-repeated="1048561">
          <table:table-cell table:number-columns-repeated="8"/>
        </table:table-row>
        <table:table-row table:style-name="ro1">
          <table:table-cell table:number-columns-repeated="8"/>
        </table:table-row>
        <table:named-expressions>
          <table:named-range table:name="ExternalData_1" table:base-cell-address="$'JSON-SCADA Config'.$A$1" table:cell-range-address="$connections.$A$1:.$H$11" table:range-usable-as="hidden"/>
        </table:named-expressions>
      </table:table>
      <table:table table:name="protocolDriverInstances" table:style-name="ta7">
        <office:forms form:automatic-focus="false" form:apply-design-mode="false"/>
        <table:table-column table:style-name="co60" table:default-cell-style-name="ce11"/>
        <table:table-column table:style-name="co47" table:default-cell-style-name="ce11"/>
        <table:table-column table:style-name="co34" table:default-cell-style-name="ce11"/>
        <table:table-column table:style-name="co61" table:default-cell-style-name="ce11"/>
        <table:table-column table:style-name="co62" table:default-cell-style-name="ce11"/>
        <table:table-column table:style-name="co63" table:default-cell-style-name="ce11"/>
        <table:table-column table:style-name="co64" table:default-cell-style-name="ce11"/>
        <table:table-column table:style-name="co6" table:default-cell-style-name="Default"/>
        <table:table-column table:style-name="co6" table:number-columns-repeated="16376"/>
        <table:table-row table:style-name="ro1">
          <table:table-cell office:value-type="string" calcext:value-type="string">
            <text:p>_id</text:p>
          </table:table-cell>
          <table:table-cell office:value-type="string" calcext:value-type="string">
            <text:p>protocolDriver</text:p>
          </table:table-cell>
          <table:table-cell office:value-type="string" calcext:value-type="string">
            <text:p>protocolDriverInstanceNumber</text:p>
          </table:table-cell>
          <table:table-cell office:value-type="string" calcext:value-type="string">
            <text:p>enabled</text:p>
          </table:table-cell>
          <table:table-cell office:value-type="string" calcext:value-type="string">
            <text:p>logLevel</text:p>
          </table:table-cell>
          <table:table-cell office:value-type="string" calcext:value-type="string">
            <text:p>nodeNames</text:p>
          </table:table-cell>
          <table:table-cell office:value-type="string" calcext:value-type="string">
            <text:p>keepProtocolRunningWhileInactive</text:p>
          </table:table-cell>
          <table:table-cell/>
          <table:table-cell table:style-name="Default" table:number-columns-repeated="16376"/>
        </table:table-row>
        <table:table-row table:style-name="ro1">
          <table:table-cell office:value-type="string" calcext:value-type="string">
            <text:p>5f1057663d8adfd3eccb206b</text:p>
          </table:table-cell>
          <table:table-cell office:value-type="string" calcext:value-type="string">
            <text:p>IEC60870-5-104_SERVER</text:p>
          </table:table-cell>
          <table:table-cell table:style-name="ce89" office:value-type="string" calcext:value-type="string">
            <text:p>1</text:p>
          </table:table-cell>
          <table:table-cell table:style-name="ce89" office:value-type="string" calcext:value-type="string">
            <text:p>true</text:p>
          </table:table-cell>
          <table:table-cell table:style-name="ce89" office:value-type="string" calcext:value-type="string">
            <text:p>1</text:p>
          </table:table-cell>
          <table:table-cell office:value-type="string" calcext:value-type="string">
            <text:p>["mainNode"]</text:p>
          </table:table-cell>
          <table:table-cell table:style-name="ce89" office:value-type="string" calcext:value-type="string">
            <text:p>false</text:p>
          </table:table-cell>
          <table:table-cell table:style-name="ce126"/>
          <table:table-cell table:style-name="Default" table:number-columns-repeated="16376"/>
        </table:table-row>
        <table:table-row table:style-name="ro1">
          <table:table-cell office:value-type="string" calcext:value-type="string">
            <text:p>64c553a3db2782d0f641a57b</text:p>
          </table:table-cell>
          <table:table-cell office:value-type="string" calcext:value-type="string">
            <text:p>IEC61850</text:p>
          </table:table-cell>
          <table:table-cell table:style-name="ce89" office:value-type="string" calcext:value-type="string">
            <text:p>1</text:p>
          </table:table-cell>
          <table:table-cell table:style-name="ce89" office:value-type="string" calcext:value-type="string">
            <text:p>true</text:p>
          </table:table-cell>
          <table:table-cell table:style-name="ce89" office:value-type="string" calcext:value-type="string">
            <text:p>1</text:p>
          </table:table-cell>
          <table:table-cell office:value-type="string" calcext:value-type="string">
            <text:p>["mainNode"]</text:p>
          </table:table-cell>
          <table:table-cell table:style-name="ce89" office:value-type="string" calcext:value-type="string">
            <text:p>false</text:p>
          </table:table-cell>
          <table:table-cell table:style-name="ce126"/>
          <table:table-cell table:style-name="Default" table:number-columns-repeated="16376"/>
        </table:table-row>
        <table:table-row table:style-name="ro1">
          <table:table-cell office:value-type="string" calcext:value-type="string">
            <text:p>66b99dd9329cae737b5b4435</text:p>
          </table:table-cell>
          <table:table-cell office:value-type="string" calcext:value-type="string">
            <text:p>TELEGRAF-LISTENER</text:p>
          </table:table-cell>
          <table:table-cell table:style-name="ce89" office:value-type="string" calcext:value-type="string">
            <text:p>1</text:p>
          </table:table-cell>
          <table:table-cell table:style-name="ce89" office:value-type="string" calcext:value-type="string">
            <text:p>true</text:p>
          </table:table-cell>
          <table:table-cell table:style-name="ce89" office:value-type="string" calcext:value-type="string">
            <text:p>1</text:p>
          </table:table-cell>
          <table:table-cell office:value-type="string" calcext:value-type="string">
            <text:p>[]</text:p>
          </table:table-cell>
          <table:table-cell table:style-name="ce89"/>
          <table:table-cell table:style-name="ce126"/>
          <table:table-cell table:style-name="Default" table:number-columns-repeated="16376"/>
        </table:table-row>
        <table:table-row table:style-name="ro1">
          <table:table-cell office:value-type="string" calcext:value-type="string">
            <text:p>6994147a744764befc1c96be</text:p>
          </table:table-cell>
          <table:table-cell office:value-type="string" calcext:value-type="string">
            <text:p>IEC60870-5-104</text:p>
          </table:table-cell>
          <table:table-cell table:style-name="ce89" office:value-type="string" calcext:value-type="string">
            <text:p>1</text:p>
          </table:table-cell>
          <table:table-cell table:style-name="ce89" office:value-type="string" calcext:value-type="string">
            <text:p>true</text:p>
          </table:table-cell>
          <table:table-cell table:style-name="ce89" office:value-type="string" calcext:value-type="string">
            <text:p>1</text:p>
          </table:table-cell>
          <table:table-cell office:value-type="string" calcext:value-type="string">
            <text:p>["mainNode"]</text:p>
          </table:table-cell>
          <table:table-cell table:style-name="ce89" office:value-type="string" calcext:value-type="string">
            <text:p>false</text:p>
          </table:table-cell>
          <table:table-cell table:style-name="ce126"/>
          <table:table-cell table:style-name="Default" table:number-columns-repeated="16376"/>
        </table:table-row>
        <table:table-row table:style-name="ro1" table:number-rows-repeated="9">
          <table:table-cell table:number-columns-repeated="2"/>
          <table:table-cell table:style-name="ce89" table:number-columns-repeated="3"/>
          <table:table-cell/>
          <table:table-cell table:style-name="ce89"/>
          <table:table-cell table:style-name="ce126"/>
          <table:table-cell table:style-name="Default" table:number-columns-repeated="16376"/>
        </table:table-row>
        <table:table-row table:style-name="ro1">
          <table:table-cell table:number-columns-repeated="2"/>
          <table:table-cell table:style-name="ce89" table:number-columns-repeated="3"/>
          <table:table-cell/>
          <table:table-cell table:style-name="ce89"/>
          <table:table-cell/>
          <table:table-cell table:style-name="Default" table:number-columns-repeated="16376"/>
        </table:table-row>
        <table:table-row table:style-name="ro1" table:number-rows-repeated="1048560">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named-expressions>
          <table:named-expression table:name="ExternalData_1" table:base-cell-address="$'JSON-SCADA Config'.$A$1" table:expression="#REF!" loext:hidden="true"/>
        </table:named-expressions>
      </table:table>
      <table:table table:name="defs" table:style-name="ta5">
        <table:table-column table:style-name="co6" table:number-columns-repeated="2" table:default-cell-style-name="ce11"/>
        <table:table-column table:style-name="co6" table:default-cell-style-name="ce211"/>
        <table:table-column table:style-name="co6" table:default-cell-style-name="ce11"/>
        <table:table-column table:style-name="co6" table:number-columns-repeated="2" table:default-cell-style-name="Default"/>
        <table:table-column table:style-name="co6" table:number-columns-repeated="16378"/>
        <table:table-row table:style-name="ro1">
          <table:table-cell office:value-type="string" calcext:value-type="string">
            <text:p>digital</text:p>
          </table:table-cell>
          <table:table-cell office:value-type="string" calcext:value-type="string">
            <text:p>supervised</text:p>
          </table:table-cell>
          <table:table-cell table:formula="of:=TRUE()" office:value-type="boolean" office:boolean-value="true" calcext:value-type="boolean">
            <text:p>TRUE</text:p>
          </table:table-cell>
          <table:table-cell office:value-type="float" office:value="-1" calcext:value-type="float">
            <text:p>-1</text:p>
          </table:table-cell>
          <table:table-cell table:number-columns-repeated="2"/>
          <table:table-cell table:style-name="Default" table:number-columns-repeated="16378"/>
        </table:table-row>
        <table:table-row table:style-name="ro4">
          <table:table-cell office:value-type="string" calcext:value-type="string">
            <text:p>analog</text:p>
          </table:table-cell>
          <table:table-cell office:value-type="string" calcext:value-type="string">
            <text:p>command</text:p>
          </table:table-cell>
          <table:table-cell table:formula="of:=FALSE()" office:value-type="boolean" office:boolean-value="false" calcext:value-type="boolean">
            <text:p>FALSE</text:p>
          </table:table-cell>
          <table:table-cell office:value-type="float" office:value="0" calcext:value-type="float">
            <text:p>0</text:p>
          </table:table-cell>
          <table:table-cell/>
          <table:table-cell table:style-name="ce212"/>
          <table:table-cell table:style-name="Default" table:number-columns-repeated="16378"/>
        </table:table-row>
        <table:table-row table:style-name="ro1">
          <table:table-cell office:value-type="string" calcext:value-type="string">
            <text:p>string</text:p>
          </table:table-cell>
          <table:table-cell office:value-type="string" calcext:value-type="string">
            <text:p>calculated</text:p>
          </table:table-cell>
          <table:table-cell table:style-name="Default"/>
          <table:table-cell office:value-type="float" office:value="1" calcext:value-type="float">
            <text:p>1</text:p>
          </table:table-cell>
          <table:table-cell table:number-columns-repeated="2"/>
          <table:table-cell table:style-name="Default" table:number-columns-repeated="16378"/>
        </table:table-row>
        <table:table-row table:style-name="ro1">
          <table:table-cell office:value-type="string" calcext:value-type="string">
            <text:p>json</text:p>
          </table:table-cell>
          <table:table-cell office:value-type="string" calcext:value-type="string">
            <text:p>manual</text:p>
          </table:table-cell>
          <table:table-cell table:style-name="Default"/>
          <table:table-cell office:value-type="float" office:value="2" calcext:value-type="float">
            <text:p>2</text:p>
          </table:table-cell>
          <table:table-cell table:number-columns-repeated="2"/>
          <table:table-cell table:style-name="Default" table:number-columns-repeated="16378"/>
        </table:table-row>
      </table:table>
      <table:named-expressions>
        <table:named-range table:name="server_addr" table:base-cell-address="$'JSON-SCADA Config'.$A$1" table:cell-range-address="$'JSON-SCADA Config'.$D$3"/>
        <table:named-range table:name="_xlcn.WorksheetConnection_jsonscadaconfig.xlsmconnections1" table:base-cell-address="$'JSON-SCADA Config'.$A$1" table:cell-range-address="$connections.$A$2:.$H$11" table:range-usable-as="hidden"/>
        <table:named-range table:name="_xlcn.WorksheetConnection_jsonscadaconfig.xlsmrealtimeData1" table:base-cell-address="$'JSON-SCADA Config'.$A$1" table:cell-range-address="$tags.$A$2:.$AY$6322" table:range-usable-as="hidden"/>
      </table:named-expressions>
      <table:database-ranges>
        <table:database-range table:name="connections" table:target-range-address="connections.A1:connections.H11" table:display-filter-buttons="true"/>
        <table:database-range table:name="realtimeData" table:target-range-address="tags.A1:tags.AY6322"/>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6P1" style:volatile="true">
      <number:text>-</number:text>
      <number:fill-character> </number:fill-character>
      <number:number number:decimal-places="0" number:min-decimal-places="0" number:min-integer-digits="1" number:grouping="true"/>
      <number:text loext:blank-width-char="-"> </number:text>
    </number:number-style>
    <number:number-style style:name="N126P2" style:volatile="true">
      <number:text loext:blank-width-char="-"> </number:text>
      <number:fill-character> </number:fill-character>
      <number:text loext:blank-width-char="-1">- </number:text>
    </number:number-style>
    <number:text-style style:name="N126">
      <number:text loext:blank-width-char="-"> </number:text>
      <number:text-content/>
      <number:text loext:blank-width-char="-"> </number:text>
      <style:map style:condition="value()&gt;0" style:apply-style-name="N126P0"/>
      <style:map style:condition="value()&lt;0" style:apply-style-name="N126P1"/>
      <style:map style:condition="value()=0" style:apply-style-name="N126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number-style style:name="N135">
      <number:number number:decimal-places="3" number:min-decimal-places="3" number:min-integer-digits="1"/>
    </number:number-style>
    <number:currency-style style:name="N137P0" style:volatile="true">
      <number:currency-symbol/>
      <number:number number:decimal-places="0" number:min-decimal-places="0" number:min-integer-digits="1" number:grouping="true"/>
      <number:text loext:blank-width-char=")"> </number:text>
    </number:currency-style>
    <number:currency-style style:name="N137">
      <number:text>(</number:text>
      <number:currency-symbol/>
      <number:number number:decimal-places="0" number:min-decimal-places="0" number:min-integer-digits="1" number:grouping="true"/>
      <number:text>)</number:text>
      <style:map style:condition="value()&gt;=0" style:apply-style-name="N137P0"/>
    </number:currency-style>
    <number:currency-style style:name="N138P0" style:volatile="true">
      <number:currency-symbol/>
      <number:number number:decimal-places="0" number:min-decimal-places="0" number:min-integer-digits="1" number:grouping="true"/>
      <number:text loext:blank-width-char=")"> </number:text>
    </number:currency-style>
    <number:currency-style style:name="N138">
      <style:text-properties fo:color="#ff0000"/>
      <number:text>(</number:text>
      <number:currency-symbol/>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number number:decimal-places="2" number:min-decimal-places="2" number:min-integer-digits="1" number:grouping="true"/>
      <number:text loext:blank-width-char=")"> </number:text>
    </number:currency-style>
    <number:currency-style style:name="N140">
      <number:text>(</number:text>
      <number:currency-symbol/>
      <number:number number:decimal-places="2" number:min-decimal-places="2" number:min-integer-digits="1" number:grouping="true"/>
      <number:text>)</number:text>
      <style:map style:condition="value()&gt;=0" style:apply-style-name="N140P0"/>
    </number:currency-style>
    <number:currency-style style:name="N141P0" style:volatile="true">
      <number:currency-symbol/>
      <number:number number:decimal-places="2" number:min-decimal-places="2" number:min-integer-digits="1" number:grouping="true"/>
      <number:text loext:blank-width-char=")"> </number:text>
    </number:currency-style>
    <number:currency-style style:name="N141">
      <style:text-properties fo:color="#ff0000"/>
      <number:text>(</number:text>
      <number:currency-symbol/>
      <number:number number:decimal-places="2" number:min-decimal-places="2" number:min-integer-digits="1" number:grouping="true"/>
      <number:text>)</number:text>
      <style:map style:condition="value()&gt;=0" style:apply-style-name="N141P0"/>
    </number:currency-style>
    <number:date-style style:name="N142">
      <number:month/>
      <number:text>/</number:text>
      <number:day/>
      <number:text>/</number:text>
      <number:year number:style="long"/>
    </number:date-style>
    <number:date-style style:name="N143">
      <number:day/>
      <number:text>-</number:text>
      <number:month number:textual="true"/>
      <number:text>-</number:text>
      <number:year/>
    </number:date-style>
    <number:date-style style:name="N144">
      <number:day/>
      <number:text>-</number:text>
      <number:month number:textual="true"/>
    </number:date-style>
    <number:date-style style:name="N145">
      <number:month number:textual="true"/>
      <number:text>-</number:text>
      <number:year/>
    </number:date-style>
    <number:time-style style:name="N146">
      <number:hours/>
      <number:text>:</number:text>
      <number:minutes number:style="long"/>
      <number:text> </number:text>
      <number:am-pm/>
    </number:time-style>
    <number:time-style style:name="N147">
      <number:hours/>
      <number:text>:</number:text>
      <number:minutes number:style="long"/>
      <number:text>:</number:text>
      <number:seconds number:style="long"/>
      <number:text> </number:text>
      <number:am-pm/>
    </number:time-style>
    <number:time-style style:name="N148">
      <number:hours/>
      <number:text>:</number:text>
      <number:minutes number:style="long"/>
    </number:time-style>
    <number:time-style style:name="N149">
      <number:hours/>
      <number:text>:</number:text>
      <number:minutes number:style="long"/>
      <number:text>:</number:text>
      <number:seconds number:style="long"/>
    </number:time-style>
    <number:date-style style:name="N150">
      <number:month/>
      <number:text>/</number:text>
      <number:day/>
      <number:text>/</number:text>
      <number:year number:style="long"/>
      <number:text> </number:text>
      <number:hours/>
      <number:text>:</number:text>
      <number:minutes number:style="long"/>
    </number:date-style>
    <number:number-style style:name="N152P0" style:volatile="true">
      <number:number number:decimal-places="0" number:min-decimal-places="0" number:min-integer-digits="1" number:grouping="true"/>
      <number:text loext:blank-width-char=")"> </number:text>
    </number:number-style>
    <number:number-style style:name="N152">
      <style:text-properties fo:color="#ff0000"/>
      <number:text>(</number:text>
      <number:number number:decimal-places="0" number:min-decimal-places="0" number:min-integer-digits="1" number:grouping="true"/>
      <number:text>)</number:text>
      <style:map style:condition="value()&gt;=0" style:apply-style-name="N152P0"/>
    </number:number-style>
    <number:number-style style:name="N154P0" style:volatile="true">
      <number:number number:decimal-places="2" number:min-decimal-places="2" number:min-integer-digits="1" number:grouping="true"/>
      <number:text loext:blank-width-char=")">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6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2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2P2" style:volatile="true">
      <number:text loext:blank-width-char="("> $</number:text>
      <number:fill-character> </number:fill-character>
      <number:text loext:blank-width-char=")1">- </number:text>
    </number:number-style>
    <number:text-style style:name="N162">
      <number:text loext:blank-width-char="("> </number:text>
      <number:text-content/>
      <number:text loext:blank-width-char=")"> </number:text>
      <style:map style:condition="value()&gt;0" style:apply-style-name="N162P0"/>
      <style:map style:condition="value()&lt;0" style:apply-style-name="N162P1"/>
      <style:map style:condition="value()=0" style:apply-style-name="N162P2"/>
    </number:text-style>
    <number:number-style style:name="N16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6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7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0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7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0">
      <number:text loext:blank-width-char="("> </number:text>
      <number:text-content/>
      <number:text loext:blank-width-char=")"> </number:text>
      <style:map style:condition="value()&gt;0" style:apply-style-name="N170P0"/>
      <style:map style:condition="value()&lt;0" style:apply-style-name="N170P1"/>
      <style:map style:condition="value()=0" style:apply-style-name="N170P2"/>
    </number:text-style>
    <number:currency-style style:name="N174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74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74P2" style:volatile="true">
      <number:text loext:blank-width-char="("> </number:text>
      <number:currency-symbol/>
      <number:fill-character> </number:fill-character>
      <number:text loext:blank-width-char=")1">- </number:text>
    </number:currency-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currency-style style:name="N178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78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78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78">
      <number:text loext:blank-width-char="("> </number:text>
      <number:text-content/>
      <number:text loext:blank-width-char=")"> </number:text>
      <style:map style:condition="value()&gt;0" style:apply-style-name="N178P0"/>
      <style:map style:condition="value()&lt;0" style:apply-style-name="N178P1"/>
      <style:map style:condition="value()=0" style:apply-style-name="N178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5" style:display-name="ConditionalStyle_5" style:family="table-cell" style:parent-style-name="Default">
      <style:text-properties fo:color="#d9d9d9">
        <loext:char-complex-color loext:theme-type="dark1" loext:color-type="theme"/>
      </style:text-properties>
    </style:style>
    <style:style style:name="ConditionalStyle_5f_6" style:display-name="ConditionalStyle_6" style:family="table-cell" style:parent-style-name="Default">
      <style:text-properties fo:color="#d9d9d9">
        <loext:char-complex-color loext:theme-type="dark1" loext:color-type="theme"/>
      </style:text-properties>
    </style:style>
    <style:style style:name="ConditionalStyle_5f_7" style:display-name="ConditionalStyle_7" style:family="table-cell" style:parent-style-name="Default">
      <style:text-properties fo:color="#d9d9d9">
        <loext:char-complex-color loext:theme-type="dark1" loext:color-type="theme"/>
      </style:text-properties>
    </style:style>
    <style:style style:name="ConditionalStyle_5f_8" style:display-name="ConditionalStyle_8" style:family="table-cell" style:parent-style-name="Default">
      <style:text-properties fo:color="#d9d9d9">
        <loext:char-complex-color loext:theme-type="dark1" loext:color-type="theme"/>
      </style:text-properties>
    </style:style>
    <style:style style:name="ConditionalStyle_5f_9" style:display-name="ConditionalStyle_9" style:family="table-cell" style:parent-style-name="Default">
      <style:text-properties fo:color="#70ad47">
        <loext:char-complex-color loext:theme-type="dark1" loext:color-type="theme"/>
      </style:text-properties>
    </style:style>
    <style:style style:name="ConditionalStyle_5f_10" style:display-name="ConditionalStyle_10" style:family="table-cell" style:parent-style-name="Default">
      <style:text-properties fo:color="#4472c4">
        <loext:char-complex-color loext:theme-type="dark1" loext:color-type="theme"/>
      </style:text-properties>
    </style:style>
    <style:style style:name="ConditionalStyle_5f_11" style:display-name="ConditionalStyle_11" style:family="table-cell" style:parent-style-name="Default">
      <style:text-properties fo:color="#d9d9d9">
        <loext:char-complex-color loext:theme-type="dark1" loext:color-type="theme"/>
      </style:text-properties>
    </style:style>
    <style:style style:name="ConditionalStyle_5f_12" style:display-name="ConditionalStyle_12" style:family="table-cell" style:parent-style-name="Default">
      <style:table-cell-properties fo:background-color="#ff0000"/>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ext-properties fo:color="#e7e6e6">
        <loext:char-complex-color loext:theme-type="dark1" loext:color-type="theme"/>
      </style:text-properties>
    </style:style>
    <style:style style:name="ConditionalStyle_5f_15" style:display-name="ConditionalStyle_15" style:family="table-cell" style:parent-style-name="Default">
      <style:text-properties fo:color="#e7e6e6">
        <loext:char-complex-color loext:theme-type="dark1" loext:color-type="theme"/>
      </style:text-properties>
    </style:style>
    <style:style style:name="ConditionalStyle_5f_16" style:display-name="ConditionalStyle_16" style:family="table-cell" style:parent-style-name="Default">
      <style:text-properties fo:color="#e7e6e6">
        <loext:char-complex-color loext:theme-type="dark1" loext:color-type="theme"/>
      </style:text-properties>
    </style:style>
    <style:style style:name="ConditionalStyle_5f_17" style:display-name="ConditionalStyle_17" style:family="table-cell" style:parent-style-name="Default">
      <style:text-properties fo:color="#e7e6e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21" style:display-name="ConditionalStyle_21" style:family="table-cell" style:parent-style-name="Default">
      <style:text-properties fo:color="#e7e6e6">
        <loext:char-complex-color loext:theme-type="light2" loext:color-type="theme"/>
      </style:text-properties>
    </style:style>
    <style:style style:name="ConditionalStyle_5f_22" style:display-name="ConditionalStyle_22" style:family="table-cell" style:parent-style-name="Default">
      <style:text-properties fo:color="#e7e6e6">
        <loext:char-complex-color loext:theme-type="light2" loext:color-type="theme"/>
      </style:text-properties>
    </style:style>
    <style:style style:name="ConditionalStyle_5f_23" style:display-name="ConditionalStyle_23" style:family="table-cell" style:parent-style-name="Default">
      <style:text-properties fo:color="#e7e6e6">
        <loext:char-complex-color loext:theme-type="light2" loext:color-type="theme"/>
      </style:text-properties>
    </style:style>
    <style:style style:name="ConditionalStyle_5f_24" style:display-name="ConditionalStyle_24" style:family="table-cell" style:parent-style-name="Default">
      <style:text-properties fo:color="#e7e6e6">
        <loext:char-complex-color loext:theme-type="light2" loext:color-type="theme"/>
      </style:text-properties>
    </style:style>
    <style:style style:name="ConditionalStyle_5f_26" style:display-name="ConditionalStyle_26" style:family="table-cell" style:parent-style-name="Default">
      <style:text-properties fo:color="#70ad47">
        <loext:char-complex-color loext:theme-type="accent6" loext:color-type="theme"/>
      </style:text-properties>
    </style:style>
    <style:style style:name="ConditionalStyle_5f_25" style:display-name="ConditionalStyle_25" style:family="table-cell" style:parent-style-name="Default">
      <style:text-properties fo:color="#4472c4">
        <loext:char-complex-color loext:theme-type="accent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3">00/00/0000</text:date>, <text:time style:data-style-name="N2" text:time-value="19:57:21.9468309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nnections" style:display-name="PageStyle_conne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tocolDriverInstances" style:display-name="PageStyle_protocolDriverInstances" style:page-layout-name="Mpm3">
      <style:header style:display="false"/>
      <style:header-left style:display="false"/>
      <style:header-first style:display="false"/>
      <style:footer style:display="false"/>
      <style:footer-left style:display="false"/>
      <style:footer-first style:display="false"/>
    </style:master-page>
    <style:master-page style:name="PageStyle_5f_tags" style:display-name="PageStyle_tags" style:page-layout-name="Mpm3">
      <style:header style:display="false"/>
      <style:header-left style:display="false"/>
      <style:header-first style:display="false"/>
      <style:footer style:display="false"/>
      <style:footer-left style:display="false"/>
      <style:footer-first style:display="false"/>
    </style:master-page>
    <style:master-page style:name="PageStyle_5f_JSON-SCADA_20_Config" style:display-name="PageStyle_JSON-SCADA Config" style:page-layout-name="Mpm3">
      <style:header style:display="false"/>
      <style:header-left style:display="false"/>
      <style:header-first style:display="false"/>
      <style:footer style:display="false"/>
      <style:footer-left style:display="false"/>
      <style:footer-first style:display="false"/>
    </style:master-page>
    <style:master-page style:name="PageStyle_5f_defs" style:display-name="PageStyle_de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6-16T20:19:06</meta:creation-date>
    <meta:initial-creator>Ricardo Olsen</meta:initial-creator>
    <dc:language>en-IN</dc:language>
    <dc:date>2026-05-13T20:00:14.837921309</dc:date>
    <meta:editing-cycles>91</meta:editing-cycles>
    <meta:editing-duration>PT11H52M1S</meta:editing-duration>
    <meta:generator>LibreOffice/26.2.2.2$Linux_X86_64 LibreOffice_project/620$Build-2</meta:generator>
    <meta:document-statistic meta:table-count="5" meta:cell-count="129" meta:object-count="5"/>
    <meta:user-defined meta:name="AppVersion">15.00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JsonConverter.xml><?xml version="1.0" encoding="utf-8"?>
<!DOCTYPE module  PUBLIC '-//OpenOffice.org//DTD OfficeDocument 1.0//EN'  'module.dtd'>
<script:module xmlns:script="http://openoffice.org/2000/script" script:name="JsonConverter" script:language="StarBasic" script:moduleType="normal">Rem Attribute VBA_ModuleType=VBAModule
Option VBASupport 1
Option Explicit

''
' JSON Converter for LibreOffice Basic
' Adapted from VBA-JSON v2.3.1
' Uses Scripting.Dictionary (Windows only)
''

Private Type json_Options
    UseDoubleForLargeNumbers As Boolean
    AllowUnquotedKeys As Boolean
    EscapeSolidus As Boolean
End Type
Public JsonOptions As json_Options

' ============================================= '
' Public Methods
' ============================================= '

Public Function ParseJson(ByVal JsonString As String) As Object
    Dim json_Index As Long
    json_Index = 1

    ' Remove vbCr, vbLf, vbTab
    JsonString = Replace(Replace(Replace(JsonString, Chr(13), ""), Chr(10), ""), Chr(9), "")

    json_SkipSpaces JsonString, json_Index
    Select Case Mid$(JsonString, json_Index, 1)
    Case "{"
        Set ParseJson = json_ParseObject(JsonString, json_Index)
    Case "["
        Set ParseJson = json_ParseArray(JsonString, json_Index)
    Case Else
        Err.Raise 10001, "JSONConverter", json_ParseErrorMessage(JsonString, json_Index, "Expecting '{' or '['")
    End Select
End Function

Public Function ConvertToJson(ByVal JsonValue As Variant, Optional ByVal Whitespace As Variant, Optional ByVal json_CurrentIndentation As Long = 0) As String
    Dim json_Buffer As String
    Dim json_Index As Long
    Dim json_LBound As Long
    Dim json_UBound As Long
    Dim json_IsFirstItem As Boolean
    Dim json_Index2D As Long
    Dim json_LBound2D As Long
    Dim json_UBound2D As Long
    Dim json_IsFirstItem2D As Boolean
    Dim json_Key As Variant
    Dim json_Value As Variant
    Dim json_DateStr As String
    Dim json_Converted As String
    Dim json_SkipItem As Boolean
    Dim json_PrettyPrint As Boolean
    Dim json_Indentation As String
    Dim json_InnerIndentation As String

    json_LBound = -1
    json_UBound = -1
    json_IsFirstItem = True
    json_LBound2D = -1
    json_UBound2D = -1
    json_IsFirstItem2D = True
    json_PrettyPrint = Not IsMissing(Whitespace)

    Select Case VarType(JsonValue)
    Case VbNull
        ConvertToJson = "null"
    Case VbDate
        ' Date – simplified ISO, no UTC conversion
        json_DateStr = ConvertToIso(CDate(JsonValue))
        ConvertToJson = """" &amp; json_DateStr &amp; """"
    Case VbString
        If Not JsonOptions.UseDoubleForLargeNumbers And json_StringIsLargeNumber(JsonValue) Then
            ConvertToJson = JsonValue
        Else
            ConvertToJson = """" &amp; json_Encode(JsonValue) &amp; """"
        End If
    Case VbBoolean
        If JsonValue Then ConvertToJson = "true" Else ConvertToJson = "false"
    Case VbArray To VbArray + VbByte
        If json_PrettyPrint Then
            If VarType(Whitespace) = VbString Then
                json_Indentation = String$(json_CurrentIndentation + 1, Whitespace)
                json_InnerIndentation = String$(json_CurrentIndentation + 2, Whitespace)
            Else
                json_Indentation = Space$((json_CurrentIndentation + 1) * Whitespace)
                json_InnerIndentation = Space$((json_CurrentIndentation + 2) * Whitespace)
            End If
        End If

        json_Buffer = json_Buffer &amp; "["

        On Error Resume Next
        json_LBound = LBound(JsonValue, 1)
        json_UBound = UBound(JsonValue, 1)
        json_LBound2D = LBound(JsonValue, 2)
        json_UBound2D = UBound(JsonValue, 2)

        If json_LBound &gt;= 0 And json_UBound &gt;= 0 Then
            For json_Index = json_LBound To json_UBound
                If json_IsFirstItem Then json_IsFirstItem = False Else json_Buffer = json_Buffer &amp; ","
                If json_LBound2D &gt;= 0 And json_UBound2D &gt;= 0 Then
                    ' 2D Array
                    If json_PrettyPrint Then json_Buffer = json_Buffer &amp; Chr(10)
                    json_Buffer = json_Buffer &amp; json_Indentation &amp; "["
                    For json_Index2D = json_LBound2D To json_UBound2D
                        If json_IsFirstItem2D Then json_IsFirstItem2D = False Else json_Buffer = json_Buffer &amp; ","
                        json_Converted = ConvertToJson(JsonValue(json_Index, json_Index2D), Whitespace, json_CurrentIndentation + 2)
                        If json_Converted = "" Then
                            If json_IsUndefined(JsonValue(json_Index, json_Index2D)) Then json_Converted = "null"
                        End If
                        If json_PrettyPrint Then json_Converted = Chr(10) &amp; json_InnerIndentation &amp; json_Converted
                        json_Buffer = json_Buffer &amp; json_Converted
                    Next json_Index2D
                    If json_PrettyPrint Then json_Buffer = json_Buffer &amp; Chr(10)
                    json_Buffer = json_Buffer &amp; json_Indentation &amp; "]"
                    json_IsFirstItem2D = True
                Else
                    ' 1D Array
                    json_Converted = ConvertToJson(JsonValue(json_Index), Whitespace, json_CurrentIndentation + 1)
                    If json_Converted = "" Then
                        If json_IsUndefined(JsonValue(json_Index)) Then json_Converted = "null"
                    End If
                    If json_PrettyPrint Then json_Converted = Chr(10) &amp; json_Indentation &amp; json_Converted
                    json_Buffer = json_Buffer &amp; json_Converted
                End If
            Next json_Index
        End If
        On Error GoTo 0

        If json_PrettyPrint Then
            json_Buffer = json_Buffer &amp; Chr(10)
            If VarType(Whitespace) = VbString Then
                json_Indentation = String$(json_CurrentIndentation, Whitespace)
            Else
                json_Indentation = Space$(json_CurrentIndentation * Whitespace)
            End If
        End If
        json_Buffer = json_Buffer &amp; json_Indentation &amp; "]"
        ConvertToJson = json_Buffer

    Case VbObject
        If json_PrettyPrint Then
            If VarType(Whitespace) = VbString Then
                json_Indentation = String$(json_CurrentIndentation + 1, Whitespace)
            Else
                json_Indentation = Space$((json_CurrentIndentation + 1) * Whitespace)
            End If
        End If

        ' Dictionary
        If TypeName(JsonValue) = "Dictionary" Then
            json_Buffer = json_Buffer &amp; "{"
            For Each json_Key In JsonValue.Keys
                json_Converted = ConvertToJson(JsonValue(json_Key), Whitespace, json_CurrentIndentation + 1)
                If json_Converted = "" Then
                    json_SkipItem = json_IsUndefined(JsonValue(json_Key))
                Else
                    json_SkipItem = False
                End If
                If Not json_SkipItem Then
                    If json_IsFirstItem Then json_IsFirstItem = False Else json_Buffer = json_Buffer &amp; ","
                    If json_PrettyPrint Then
                        json_Converted = Chr(10) &amp; json_Indentation &amp; """" &amp; json_Key &amp; """: " &amp; json_Converted
                    Else
                        json_Converted = """" &amp; json_Key &amp; """:" &amp; json_Converted
                    End If
                    json_Buffer = json_Buffer &amp; json_Converted
                End If
            Next json_Key
            If json_PrettyPrint Then
                json_Buffer = json_Buffer &amp; Chr(10)
                If VarType(Whitespace) = VbString Then
                    json_Indentation = String$(json_CurrentIndentation, Whitespace)
                Else
                    json_Indentation = Space$(json_CurrentIndentation * Whitespace)
                End If
            End If
            json_Buffer = json_Buffer &amp; json_Indentation &amp; "}"
        ' Collection
        ElseIf TypeName(JsonValue) = "Collection" Then
            json_Buffer = json_Buffer &amp; "["
            For Each json_Value In JsonValue
                If json_IsFirstItem Then json_IsFirstItem = False Else json_Buffer = json_Buffer &amp; ","
                json_Converted = ConvertToJson(json_Value, Whitespace, json_CurrentIndentation + 1)
                If json_Converted = "" Then
                    If json_IsUndefined(json_Value) Then json_Converted = "null"
                End If
                If json_PrettyPrint Then json_Converted = Chr(10) &amp; json_Indentation &amp; json_Converted
                json_Buffer = json_Buffer &amp; json_Converted
            Next json_Value
            If json_PrettyPrint Then
                json_Buffer = json_Buffer &amp; Chr(10)
                If VarType(Whitespace) = VbString Then
                    json_Indentation = String$(json_CurrentIndentation, Whitespace)
                Else
                    json_Indentation = Space$(json_CurrentIndentation * Whitespace)
                End If
            End If
            json_Buffer = json_Buffer &amp; json_Indentation &amp; "]"
        End If
        ConvertToJson = json_Buffer

    Case VbInteger, VbLong, VbSingle, VbDouble, VbCurrency, VbDecimal
        ConvertToJson = Replace(JsonValue, ",", ".")
    Case Else
        On Error Resume Next
        ConvertToJson = JsonValue
        On Error GoTo 0
    End Select
End Function

' ============================================= '
' Private Functions
' ============================================= '

Private Function json_ParseObject(json_String As String, ByRef json_Index As Long) As Object
    Dim json_Key As String
    Dim json_NextChar As String

    Set json_ParseObject = CreateObject("Scripting.Dictionary")
    json_SkipSpaces json_String, json_Index
    If Mid$(json_String, json_Index, 1) &lt;&gt; "{" Then
        Err.Raise 10001, "JSONConverter", json_ParseErrorMessage(json_String, json_Index, "Expecting '{'")
    Else
        json_Index = json_Index + 1
        Do
            json_SkipSpaces json_String, json_Index
            If Mid$(json_String, json_Index, 1) = "}" Then
                json_Index = json_Index + 1
                Exit Function
            ElseIf Mid$(json_String, json_Index, 1) = "," Then
                json_Index = json_Index + 1
                json_SkipSpaces json_String, json_Index
            End If
            json_Key = json_ParseKey(json_String, json_Index)
            json_NextChar = json_Peek(json_String, json_Index)
            If json_NextChar = "[" Or json_NextChar = "{" Then
                Set json_ParseObject.Item(json_Key) = json_ParseValue(json_String, json_Index)
            Else
                json_ParseObject.Item(json_Key) = json_ParseValue(json_String, json_Index)
            End If
        Loop
    End If
End Function

Private Function json_ParseArray(json_String As String, ByRef json_Index As Long) As Collection
    Set json_ParseArray = New Collection
    json_SkipSpaces json_String, json_Index
    If Mid$(json_String, json_Index, 1) &lt;&gt; "[" Then
        Err.Raise 10001, "JSONConverter", json_ParseErrorMessage(json_String, json_Index, "Expecting '['")
    Else
        json_Index = json_Index + 1
        Do
            json_SkipSpaces json_String, json_Index
            If Mid$(json_String, json_Index, 1) = "]" Then
                json_Index = json_Index + 1
                Exit Function
            ElseIf Mid$(json_String, json_Index, 1) = "," Then
                json_Index = json_Index + 1
                json_SkipSpaces json_String, json_Index
            End If
            json_ParseArray.Add json_ParseValue(json_String, json_Index)
        Loop
    End If
End Function

Private Function json_ParseValue(json_String As String, ByRef json_Index As Long) As Variant
    json_SkipSpaces json_String, json_Index
    Select Case Mid$(json_String, json_Index, 1)
    Case "{"
        Set json_ParseValue = json_ParseObject(json_String, json_Index)
    Case "["
        Set json_ParseValue = json_ParseArray(json_String, json_Index)
    Case """", "'"
        json_ParseValue = json_ParseString(json_String, json_Index)
    Case Else
        If Mid$(json_String, json_Index, 4) = "true" Then
            json_ParseValue = True
            json_Index = json_Index + 4
        ElseIf Mid$(json_String, json_Index, 5) = "false" Then
            json_ParseValue = False
            json_Index = json_Index + 5
        ElseIf Mid$(json_String, json_Index, 4) = "null" Then
            json_ParseValue = Null
            json_Index = json_Index + 4
        ElseIf InStr("+-0123456789", Mid$(json_String, json_Index, 1)) Then
            json_ParseValue = json_ParseNumber(json_String, json_Index)
        Else
            Err.Raise 10001, "JSONConverter", json_ParseErrorMessage(json_String, json_Index, "Expecting 'STRING', 'NUMBER', null, true, false, '{', or '['")
        End If
    End Select
End Function

Private Function json_ParseString(json_String As String, ByRef json_Index As Long) As String
    Dim json_Quote As String
    Dim json_Char As String
    Dim json_Code As String
    Dim json_Buffer As String

    json_SkipSpaces json_String, json_Index
    json_Quote = Mid$(json_String, json_Index, 1)
    json_Index = json_Index + 1

    Do While json_Index &gt; 0 And json_Index &lt;= Len(json_String)
        json_Char = Mid$(json_String, json_Index, 1)
        Select Case json_Char
        Case "\"
            json_Index = json_Index + 1
            json_Char = Mid$(json_String, json_Index, 1)
            Select Case json_Char
            Case """", "\", "/", "'"
                json_Buffer = json_Buffer &amp; json_Char
                json_Index = json_Index + 1
            Case "b"
                json_Buffer = json_Buffer &amp; Chr(8)
                json_Index = json_Index + 1
            Case "f"
                json_Buffer = json_Buffer &amp; Chr(12)
                json_Index = json_Index + 1
            Case "n"
                json_Buffer = json_Buffer &amp; Chr(10)
                json_Index = json_Index + 1
            Case "r"
                json_Buffer = json_Buffer &amp; Chr(13)
                json_Index = json_Index + 1
            Case "t"
                json_Buffer = json_Buffer &amp; Chr(9)
                json_Index = json_Index + 1
            Case "u"
                json_Index = json_Index + 1
                json_Code = Mid$(json_String, json_Index, 4)
                json_Buffer = json_Buffer &amp; ChrW(Val("&amp;h" + json_Code))
                json_Index = json_Index + 4
            End Select
        Case json_Quote
            json_ParseString = json_Buffer
            json_Index = json_Index + 1
            Exit Function
        Case Else
            json_Buffer = json_Buffer &amp; json_Char
            json_Index = json_Index + 1
        End Select
    Loop
End Function

Private Function json_ParseNumber(json_String As String, ByRef json_Index As Long) As Variant
    Dim json_Char As String
    Dim json_Value As String
    Dim json_IsLargeNumber As Boolean

    json_SkipSpaces json_String, json_Index
    Do While json_Index &gt; 0 And json_Index &lt;= Len(json_String)
        json_Char = Mid$(json_String, json_Index, 1)
        If InStr("+-0123456789.eE", json_Char) Then
            json_Value = json_Value &amp; json_Char
            json_Index = json_Index + 1
        Else
            json_IsLargeNumber = IIf(InStr(json_Value, "."), Len(json_Value) &gt;= 17, Len(json_Value) &gt;= 16)
            If Not JsonOptions.UseDoubleForLargeNumbers And json_IsLargeNumber Then
                json_ParseNumber = json_Value
            Else
                json_ParseNumber = Val(json_Value)
            End If
            Exit Function
        End If
    Loop
End Function

Private Function json_ParseKey(json_String As String, ByRef json_Index As Long) As String
    If Mid$(json_String, json_Index, 1) = """" Or Mid$(json_String, json_Index, 1) = "'" Then
        json_ParseKey = json_ParseString(json_String, json_Index)
    ElseIf JsonOptions.AllowUnquotedKeys Then
        Dim json_Char As String
        Do While json_Index &gt; 0 And json_Index &lt;= Len(json_String)
            json_Char = Mid$(json_String, json_Index, 1)
            If (json_Char &lt;&gt; " ") And (json_Char &lt;&gt; ":") Then
                json_ParseKey = json_ParseKey &amp; json_Char
                json_Index = json_Index + 1
            Else
                Exit Do
            End If
        Loop
    Else
        Err.Raise 10001, "JSONConverter", json_ParseErrorMessage(json_String, json_Index, "Expecting '""' or '''")
    End If
    json_SkipSpaces json_String, json_Index
    If Mid$(json_String, json_Index, 1) &lt;&gt; ":" Then
        Err.Raise 10001, "JSONConverter", json_ParseErrorMessage(json_String, json_Index, "Expecting ':'")
    Else
        json_Index = json_Index + 1
    End If
End Function

Private Function json_IsUndefined(ByVal json_Value As Variant) As Boolean
    Select Case VarType(json_Value)
    Case VbEmpty
        json_IsUndefined = True
    Case VbObject
        Select Case TypeName(json_Value)
        Case "Empty", "Nothing"
            json_IsUndefined = True
        End Select
    End Select
End Function

Private Function json_Encode(ByVal json_Text As Variant) As String
    Dim json_Index As Long
    Dim json_Char As String
    Dim json_AscCode As Long
    json_Encode = ""
    For json_Index = 1 To Len(json_Text)
        json_Char = Mid$(json_Text, json_Index, 1)
        json_AscCode = AscW(json_Char)
        If json_AscCode &lt; 0 Then json_AscCode = json_AscCode + 65536
        Select Case json_AscCode
        Case 34: json_Char = "\"""
        Case 92: json_Char = "\\"
        Case 47: If JsonOptions.EscapeSolidus Then json_Char = "\/"
        Case 8: json_Char = "\b"
        Case 12: json_Char = "\f"
        Case 10: json_Char = "\n"
        Case 13: json_Char = "\r"
        Case 9: json_Char = "\t"
        Case 0 To 31, 127 To 65535
            json_Char = "\u" &amp; Right$("0000" &amp; Hex$(json_AscCode), 4)
        End Select
        json_Encode = json_Encode &amp; json_Char
    Next
End Function

Private Function json_Peek(json_String As String, ByVal json_Index As Long, Optional json_NumberOfCharacters As Long = 1) As String
    json_SkipSpaces json_String, json_Index
    json_Peek = Mid$(json_String, json_Index, json_NumberOfCharacters)
End Function

Private Sub json_SkipSpaces(json_String As String, ByRef json_Index As Long)
    Do While json_Index &gt; 0 And json_Index &lt;= Len(json_String) And Mid$(json_String, json_Index, 1) = " "
        json_Index = json_Index + 1
    Loop
End Sub

Private Function json_StringIsLargeNumber(json_String As Variant) As Boolean
    Dim json_Length As Long, i As Long, json_CharCode As Long
    json_Length = Len(json_String)
    If json_Length &gt;= 16 And json_Length &lt;= 100 Then
        json_StringIsLargeNumber = True
        For i = 1 To json_Length
            json_CharCode = Asc(Mid$(json_String, i, 1))
            Select Case json_CharCode
            Case 46, 48 To 57, 69, 101
            Case Else
                json_StringIsLargeNumber = False
                Exit Function
            End Select
        Next
    End If
End Function

Private Function json_ParseErrorMessage(json_String As String, ByRef json_Index As Long, ErrorMessage As String)
    Dim json_StartIndex As Long, json_StopIndex As Long
    json_StartIndex = json_Index - 10
    json_StopIndex = json_Index + 10
    If json_StartIndex &lt;= 0 Then json_StartIndex = 1
    If json_StopIndex &gt; Len(json_String) Then json_StopIndex = Len(json_String)
    json_ParseErrorMessage = "Error parsing JSON:" &amp; Chr(10) &amp; _
                             Mid$(json_String, json_StartIndex, json_StopIndex - json_StartIndex + 1) &amp; Chr(10) &amp; _
                             Space$(json_Index - json_StartIndex) &amp; "^" &amp; Chr(10) &amp; _
                             ErrorMessage
End Function

''
' Simplified ISO 8601 converter (no UTC timezone correction)
''
Public Function ConvertToIso(utc_LocalDate As Date) As String
    ConvertToIso = Format$(utc_LocalDate, "yyyy-mm-ddTHH:MM:ss.000") &amp; "Z"
End Function

</script:module>
</file>

<file path=Basic/VBAProject/ReadData.xml><?xml version="1.0" encoding="utf-8"?>
<!DOCTYPE module  PUBLIC '-//OpenOffice.org//DTD OfficeDocument 1.0//EN'  'module.dtd'>
<script:module xmlns:script="http://openoffice.org/2000/script" script:name="ReadData" script:language="StarBasic" script:moduleType="normal">Option VBASupport 1
Option Explicit

' ====================================================================
' Server address helper
' ====================================================================
Private Function GetServerAddr() As String
    On Error Resume Next
    Dim oRange As Object
    oRange = ThisComponent.NamedRanges.getByName("server_addr").getReferredCells()
    If Not oRange Is Nothing Then
        GetServerAddr = oRange.getCellByPosition(0,0).getString()
    Else
        MsgBox "Named range 'server_addr' is missing." &amp; Chr(10) &amp; _
               "Create it via Sheet &gt; Named Ranges and Expressions &gt; Define."
    End If
    On Error GoTo 0
End Function

' ====================================================================
' Download a URL using MSXML2.ServerXMLHTTP (Windows built‑in)
' ====================================================================
Private Function DownloadText(url As String) As String
    On Error GoTo ErrorHandler
    Dim http As Object
    Set http = CreateObject("MSXML2.ServerXMLHTTP")
    http.Open "GET", url, False
    http.send
    DownloadText = http.responseText
    Exit Function

ErrorHandler:
    MsgBox "Download error: " &amp; Error$ &amp; " (URL: " &amp; url &amp; ")"
    DownloadText = ""
End Function

' ====================================================================
' CSV parser – handles quoted fields (commas inside quotes)
' ====================================================================
Private Function ParseCsvLine(csvLine As String) As Variant
    Dim fields() As String
    Dim field As String
    Dim i As Long, c As String
    Dim inQuotes As Boolean
    Dim tmp() As String

    ReDim tmp(0 To 0)
    field = ""
    inQuotes = False
    i = 1

    Do While i &lt;= Len(csvLine)
        c = Mid(csvLine, i, 1)
        If inQuotes Then
            If c = """" Then
                If i &lt; Len(csvLine) And Mid(csvLine, i + 1, 1) = """" Then
                    field = field &amp; """"
                    i = i + 1
                Else
                    inQuotes = False
                End If
            Else
                field = field &amp; c
            End If
        Else
            If c = """" Then
                inQuotes = True
            ElseIf c = "," Then
                tmp(UBound(tmp)) = field
                ReDim Preserve tmp(0 To UBound(tmp) + 1)
                field = ""
            Else
                field = field &amp; c
            End If
        End If
        i = i + 1
    Loop
    tmp(UBound(tmp)) = field
    ParseCsvLine = tmp
End Function

' ====================================================================
' Write CSV data to sheet (block write for speed) + show confirmation
' ====================================================================
Private Sub WriteCsvToSheet(sheetName As String, csvText As String)
    On Error GoTo ErrorHandler
    Dim oSheet As Object
    Dim lines() As String
    Dim fields As Variant
    Dim row As Long, col As Long, maxRow As Long, maxCol As Long
    Dim blockSize As Long, blockStart As Long, blockEnd As Long
    Dim dataBlock() As Variant

    If csvText = "" Then Exit Sub

    ' Normalize line endings
    csvText = Replace(csvText, Chr(13) &amp; Chr(10), Chr(10))
    csvText = Replace(csvText, Chr(13), Chr(10))
    lines = Split(csvText, Chr(10))
    maxRow = UBound(lines)
    If maxRow &lt; 0 Then Exit Sub

    ' Find maximum columns
    maxCol = 0
    For row = 0 To maxRow
        If lines(row) &lt;&gt; "" Then
            fields = ParseCsvLine(lines(row))
            If UBound(fields) &gt; maxCol Then maxCol = UBound(fields)
        End If
    Next row

    ' Get sheet
    oSheet = ThisComponent.Sheets.getByName(sheetName)
    If oSheet Is Nothing Then
        MsgBox "Sheet '" &amp; sheetName &amp; "' does not exist!"
        Exit Sub
    End If
    If oSheet.isProtected() Then
        MsgBox "Sheet '" &amp; sheetName &amp; "' is protected. Unprotect it first."
        Exit Sub
    End If

    ' Freeze screen
    On Local Error Resume Next
    ThisComponent.lockControllers()

    ' Clear target area
    Dim clearRange As Object
    clearRange = oSheet.getCellRangeByPosition(0, 0, maxCol, maxRow)
    clearRange.clearContents(com.sun.star.sheet.CellFlags.VALUE Or _
                              com.sun.star.sheet.CellFlags.STRING Or _
                              com.sun.star.sheet.CellFlags.DATETIME)

    ' Write in blocks of 500 rows
    blockSize = 500
    blockStart = 0
    Do While blockStart &lt;= maxRow
        blockEnd = IIf(blockStart + blockSize - 1 &gt; maxRow, maxRow, blockStart + blockSize - 1)
        Dim blockRows As Long
        blockRows = blockEnd - blockStart + 1
        ReDim dataBlock(0 To blockRows - 1, 0 To maxCol) As Variant

        For row = blockStart To blockEnd
            If lines(row) &lt;&gt; "" Then
                fields = ParseCsvLine(lines(row))
                For col = 0 To UBound(fields)
                    dataBlock(row - blockStart, col) = fields(col)
                Next col
                For col = UBound(fields) + 1 To maxCol
                    dataBlock(row - blockStart, col) = ""
                Next col
            Else
                For col = 0 To maxCol
                    dataBlock(row - blockStart, col) = ""
                Next col
            End If
        Next row

        Dim blockRange As Object
        blockRange = oSheet.getCellRangeByPosition(0, blockStart, maxCol, blockEnd)
        blockRange.setDataArray(dataBlock())
        blockStart = blockStart + blockSize
    Loop

    ThisComponent.unlockControllers()

    ' *** CONFIRMATION POPUP ***
    MsgBox "Written " &amp; (maxRow + 1) &amp; " rows and " &amp; (maxCol + 1) &amp; " columns to sheet '" &amp; sheetName &amp; "'."
    Exit Sub

ErrorHandler:
    On Error Resume Next
    ThisComponent.unlockControllers()
    MsgBox "Error writing to sheet '" &amp; sheetName &amp; "': " &amp; Error$ &amp; " (" &amp; Err &amp; ")"
End Sub

' ====================================================================
' Button macros
' ====================================================================
Public Sub ReadRtData_Click()
    Dim answer As Integer
    answer = MsgBox("Confirm refresh tags data: this will erase any possible edited tags!", _
                     vbQuestion + vbYesNo + vbDefaultButton2, "Load Tag Data")
    If answer = vbYes Then
        Dim csv As String
        Dim url As String
        url = "http://" &amp; GetServerAddr() &amp; "/excel/realtimeData.csv"
        csv = DownloadText(url)
        If csv &lt;&gt; "" Then WriteCsvToSheet "tags", csv
    End If
End Sub

Public Sub ReadConnections_Click()
    Dim csv As String
    Dim url As String
    url = "http://" &amp; GetServerAddr() &amp; "/excel/connections.csv"
    csv = DownloadText(url)
    If csv &lt;&gt; "" Then WriteCsvToSheet "connections", csv
End Sub

Public Sub ReadInstances_Click()
    Dim csv As String
    Dim url As String
    url = "http://" &amp; GetServerAddr() &amp; "/excel/protocolDriverInstances.csv"
    csv = DownloadText(url)
    If csv &lt;&gt; "" Then WriteCsvToSheet "protocolDriverInstances", csv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WriteData.xml><?xml version="1.0" encoding="utf-8"?>
<!DOCTYPE module  PUBLIC '-//OpenOffice.org//DTD OfficeDocument 1.0//EN'  'module.dtd'>
<script:module xmlns:script="http://openoffice.org/2000/script" script:name="WriteData" script:language="StarBasic" script:moduleType="normal">Option VBASupport 1
Option Explicit

' ====================================================================
' Server address helper
' ====================================================================
Private Function GetServerAddr() As String
    On Error Resume Next
    Dim oRange As Object
    oRange = ThisComponent.NamedRanges.getByName("server_addr").getReferredCells()
    If Not oRange Is Nothing Then
        GetServerAddr = oRange.getCellByPosition(0,0).getString()
    Else
        MsgBox "Named range 'server_addr' is missing."
    End If
    On Error GoTo 0
End Function

' ====================================================================
' Read cell value – native type (number, string, boolean, null)
' ====================================================================
Private Function GetCellValue(oSheet As Object, col As Long, row As Long) As Variant
    On Error Resume Next
    Dim cell As Object
    cell = oSheet.getCellByPosition(col, row)
    If cell Is Nothing Then
        GetCellValue = Null
        Exit Function
    End If

    Dim cellType As Long
    cellType = cell.getType()   ' 0=EMPTY, 1=VALUE, 2=TEXT, 3=FORMULA

    Select Case cellType
    Case 0
        GetCellValue = Null
    Case 1, 3
        GetCellValue = cell.getValue()
    Case 2
        Dim s As String
        s = cell.getString()
        If LCase(s) = "true" Then
            GetCellValue = True
        ElseIf LCase(s) = "false" Then
            GetCellValue = False
        Else
            GetCellValue = s
        End If
    Case Else
        GetCellValue = cell.getString()
    End Select
End Function

' ====================================================================
' Escape string for JSON
' ====================================================================
Private Function EscapeJsonString(s As String) As String
    s = Replace(s, "\", "\\")
    s = Replace(s, """", "\""")
    s = Replace(s, Chr(10), "\n")
    s = Replace(s, Chr(13), "\r")
    s = Replace(s, Chr(9), "\t")
    EscapeJsonString = s
End Function

' ====================================================================
' Convert Variant → JSON literal
' ====================================================================
Private Function ValueToJson(val As Variant) As String
    If IsNull(val) Then
        ValueToJson = "null"
        Exit Function
    End If
    Select Case VarType(val)
    Case VbBoolean
        If val = True Then ValueToJson = "true" Else ValueToJson = "false"
    Case VbInteger, VbLong, VbSingle, VbDouble, VbCurrency, VbDecimal
        ValueToJson = Replace(CStr(val), ",", ".")
    Case VbDate
        ValueToJson = """" &amp; Format$(val, "yyyy-mm-ddTHH:MM:ss.000") &amp; "Z" &amp; """"
    Case VbString
        ValueToJson = """" &amp; EscapeJsonString(val) &amp; """"
    Case Else
        ValueToJson = """" &amp; EscapeJsonString(CStr(val)) &amp; """"
    End Select
End Function

' ====================================================================
' Find last used row / column
' ====================================================================
Private Sub GetUsedRange(sheetName As String, ByRef lastRow As Long, ByRef lastCol As Long)
    Dim oSheet As Object
    oSheet = ThisComponent.Sheets.getByName(sheetName)
    lastRow = 0
    lastCol = 0

    ' --- Find last row ---
    Dim row As Long
    row = 0
    Do While True
        Dim cellVal As String
        cellVal = oSheet.getCellByPosition(0, row).getString()
        If cellVal = "" Then
            Dim allEmpty As Boolean
            allEmpty = True
            Dim i As Long
            For i = 1 To 5
                If oSheet.getCellByPosition(0, row + i).getString() &lt;&gt; "" Then
                    allEmpty = False
                    Exit For
                End If
            Next i
            If allEmpty Then Exit Do
        End If
        row = row + 1
    Loop
    lastRow = row - 1

    ' --- Find last column ---
    Dim col As Long
    col = 0
    Do While True
        cellVal = oSheet.getCellByPosition(col, 0).getString()
        If cellVal = "" Then
            allEmpty = True
            For i = 1 To 5
                If oSheet.getCellByPosition(col + i, 0).getString() &lt;&gt; "" Then
                    allEmpty = False
                    Exit For
                End If
            Next i
            If allEmpty Then Exit Do
        End If
        col = col + 1
    Loop
    lastCol = col - 1
End Sub

' ====================================================================
' Build compact JSON array from sheet
' ====================================================================
Private Function BuildJsonFromSheet(sheetName As String) As String
    On Error GoTo ErrorHandler
    Dim oSheet As Object
    Dim lastRow As Long, lastCol As Long
    Dim header() As String
    Dim c As Long, r As Long
    Dim json As String
    Dim rowJson As String
    Dim val As Variant
    Dim firstRow As Boolean

    oSheet = ThisComponent.Sheets.getByName(sheetName)
    If oSheet Is Nothing Then
        MsgBox "Sheet '" &amp; sheetName &amp; "' does not exist!"
        BuildJsonFromSheet = "[]"
        Exit Function
    End If

    GetUsedRange sheetName, lastRow, lastCol
    If lastRow &lt; 1 Or lastCol &lt; 0 Then
        BuildJsonFromSheet = "[]"
        Exit Function
    End If

    ' Read headers
    ReDim header(0 To lastCol)
    For c = 0 To lastCol
        header(c) = oSheet.getCellByPosition(c, 0).getString()
    Next c

    ' Build JSON (no whitespace)
    json = "["
    firstRow = True
    For r = 1 To lastRow
        rowJson = ""
        Dim firstCol As Boolean
        firstCol = True
        For c = 0 To lastCol
            val = GetCellValue(oSheet, c, r)
            If firstCol Then
                firstCol = False
            Else
                rowJson = rowJson &amp; ","
            End If
            rowJson = rowJson &amp; """" &amp; EscapeJsonString(header(c)) &amp; """:" &amp; ValueToJson(val)
        Next c
        If firstRow Then
            firstRow = False
        Else
            json = json &amp; ","
        End If
        json = json &amp; "{" &amp; rowJson &amp; "}"
    Next r
    json = json &amp; "]"
    BuildJsonFromSheet = json
    Exit Function

ErrorHandler:
    MsgBox "Error building JSON: " &amp; Error$
    BuildJsonFromSheet = "[]"
End Function

' ====================================================================
' POST JSON using MSXML2.ServerXMLHTTP (reliable)
' ====================================================================
Private Sub PostJsonToServer(url As String, jsonStr As String)
    On Error GoTo ErrorHandler
    Dim http As Object
    Set http = CreateObject("MSXML2.ServerXMLHTTP")
    http.Open "POST", url, False
    http.setRequestHeader "Content-Type", "text/plain"
    http.send jsonStr

    If http.Status = 200 Then
        MsgBox "Update successful (HTTP 200)."
    Else
        MsgBox "Server returned HTTP " &amp; http.Status &amp; "." &amp; Chr(10) &amp; _
               "Response (first 500 chars): " &amp; Left(http.responseText, 500)
    End If
    Exit Sub

ErrorHandler:
    MsgBox "HTTP request failed: " &amp; Error$ &amp; Chr(10) &amp; _
           "Check server logs."
End Sub

' ====================================================================
' Button macro – Update RealTime Data
' ====================================================================
Public Sub UpdateRtData_Click()
    Dim jsonStr As String
    Dim url As String

    url = "http://" &amp; GetServerAddr() &amp; "/excel/realtimeDataUpdate"
    jsonStr = BuildJsonFromSheet("tags")

    If jsonStr = "[]" Or jsonStr = "" Then
        MsgBox "No data to send (sheet is empty or missing)."
        Exit Sub
    End If

    ' Send directly – no diagnostic prompt
    PostJsonToServer url, jsonStr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WriteData"/>
  <library:element library:name="ThisWorkbook"/>
  <library:element library:name="Sheet5"/>
  <library:element library:name="Sheet2"/>
  <library:element library:name="Sheet1"/>
  <library:element library:name="Sheet3"/>
  <library:element library:name="Sheet4"/>
  <library:element library:name="ReadData"/>
  <library:element library:name="JsonConverter"/>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